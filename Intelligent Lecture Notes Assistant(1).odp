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A9D9447A.png" manifest:media-type="image/png"/>
  <manifest:file-entry manifest:full-path="Pictures/10000001000000180000001A668E817E.png" manifest:media-type="image/png"/>
  <manifest:file-entry manifest:full-path="Pictures/1000000100000500000002585DD46150.png" manifest:media-type="image/png"/>
  <manifest:file-entry manifest:full-path="Pictures/10000001000002260000017B95D28511.png" manifest:media-type="image/png"/>
  <manifest:file-entry manifest:full-path="Pictures/100000010000022600000137593B5ECB.png" manifest:media-type="image/png"/>
  <manifest:file-entry manifest:full-path="Pictures/100000010000001300000013ACFB3196.png" manifest:media-type="image/png"/>
  <manifest:file-entry manifest:full-path="Pictures/10000001000000290000002958D823F5.png" manifest:media-type="image/png"/>
  <manifest:file-entry manifest:full-path="Pictures/100000010000001800000013D11B9117.png" manifest:media-type="image/png"/>
  <manifest:file-entry manifest:full-path="Pictures/10000001000002260000013742D0EAAD.png" manifest:media-type="image/png"/>
  <manifest:file-entry manifest:full-path="Pictures/10000001000000180000001AD813F462.png" manifest:media-type="image/png"/>
  <manifest:file-entry manifest:full-path="Pictures/10000001000000180000001A42154B88.png" manifest:media-type="image/png"/>
  <manifest:file-entry manifest:full-path="Pictures/100000010000015B000000FB400691E2.png" manifest:media-type="image/png"/>
  <manifest:file-entry manifest:full-path="Pictures/10000001000000180000001AC326C946.png" manifest:media-type="image/png"/>
  <manifest:file-entry manifest:full-path="Pictures/10000001000002260000017505F983A8.png" manifest:media-type="image/png"/>
  <manifest:file-entry manifest:full-path="Pictures/100000010000001E0000001A824161A0.png" manifest:media-type="image/png"/>
  <manifest:file-entry manifest:full-path="Pictures/10000001000002260000017590D4F16F.png" manifest:media-type="image/png"/>
  <manifest:file-entry manifest:full-path="Pictures/10000001000000180000001A90DBACA4.png" manifest:media-type="image/png"/>
  <manifest:file-entry manifest:full-path="Pictures/100000010000016F0000014DE756B6B4.png" manifest:media-type="image/png"/>
  <manifest:file-entry manifest:full-path="Pictures/100000010000001F0000002917BEE144.png" manifest:media-type="image/png"/>
  <manifest:file-entry manifest:full-path="Pictures/10000001000000180000001AD02BAEE5.png" manifest:media-type="image/png"/>
  <manifest:file-entry manifest:full-path="Pictures/100000010000002400000029551D4756.png" manifest:media-type="image/png"/>
  <manifest:file-entry manifest:full-path="Pictures/100000010000003300000029A48C1AFE.png" manifest:media-type="image/png"/>
  <manifest:file-entry manifest:full-path="Pictures/1000000100000226000001914E76D5AA.png" manifest:media-type="image/png"/>
  <manifest:file-entry manifest:full-path="Pictures/10000001000002260000019155D5C927.png" manifest:media-type="image/png"/>
  <manifest:file-entry manifest:full-path="Pictures/10000001000000180000001A7AE21F7F.png" manifest:media-type="image/png"/>
  <manifest:file-entry manifest:full-path="Pictures/100000010000001E0000001AE464A34F.png" manifest:media-type="image/png"/>
  <manifest:file-entry manifest:full-path="Pictures/10000001000000150000001AF8522D36.png" manifest:media-type="image/png"/>
  <manifest:file-entry manifest:full-path="Pictures/100000010000016F000000EF00F396BE.png" manifest:media-type="image/png"/>
  <manifest:file-entry manifest:full-path="Pictures/10000001000000180000001AE1AA67A2.png" manifest:media-type="image/png"/>
  <manifest:file-entry manifest:full-path="Pictures/100000010000001B0000001A8EA217E9.png" manifest:media-type="image/png"/>
  <manifest:file-entry manifest:full-path="Pictures/10000001000000180000001AF623641F.png" manifest:media-type="image/png"/>
  <manifest:file-entry manifest:full-path="Pictures/10000001000000180000001A08522CF8.png" manifest:media-type="image/png"/>
  <manifest:file-entry manifest:full-path="Pictures/1000000100000024000000298A62AB38.png" manifest:media-type="image/png"/>
  <manifest:file-entry manifest:full-path="Pictures/100000010000015B000000FB326246FC.png" manifest:media-type="image/png"/>
  <manifest:file-entry manifest:full-path="Pictures/10000001000000180000001A9FCB4036.png" manifest:media-type="image/png"/>
  <manifest:file-entry manifest:full-path="Pictures/10000001000000180000001AB71F7A54.png" manifest:media-type="image/png"/>
  <manifest:file-entry manifest:full-path="Pictures/1000000100000029000000293FD5005A.png" manifest:media-type="image/png"/>
  <manifest:file-entry manifest:full-path="Pictures/1000000100000170000000D63E101C61.png" manifest:media-type="image/png"/>
  <manifest:file-entry manifest:full-path="Pictures/100000010000016F000000D608BB48F1.png" manifest:media-type="image/png"/>
  <manifest:file-entry manifest:full-path="Pictures/100000010000016F000000D6497A5980.png" manifest:media-type="image/png"/>
  <manifest:file-entry manifest:full-path="Pictures/1000000100000774000003A83F4A6CCD.png" manifest:media-type="image/png"/>
  <manifest:file-entry manifest:full-path="Pictures/100000010000002400000029DD102543.png" manifest:media-type="image/png"/>
  <manifest:file-entry manifest:full-path="Pictures/100000010000016F000000D6CEAD4965.png" manifest:media-type="image/png"/>
  <manifest:file-entry manifest:full-path="Pictures/1000000100000170000000D68F630B49.png" manifest:media-type="image/png"/>
  <manifest:file-entry manifest:full-path="Pictures/100000010000016F000000D682F48A54.png" manifest:media-type="image/png"/>
  <manifest:file-entry manifest:full-path="Pictures/1000000100000033000000298EC5237F.png" manifest:media-type="image/png"/>
  <manifest:file-entry manifest:full-path="Pictures/1000000100000029000000290A07AA78.png" manifest:media-type="image/png"/>
  <manifest:file-entry manifest:full-path="Pictures/100000010000010C000000F73504B2C3.png" manifest:media-type="image/png"/>
  <manifest:file-entry manifest:full-path="Pictures/TablePreview1.svm" manifest:media-type=""/>
  <manifest:file-entry manifest:full-path="Pictures/100000010000048800000058665801A8.png" manifest:media-type="image/png"/>
  <manifest:file-entry manifest:full-path="Pictures/100000010000010C000000F713EF021A.png" manifest:media-type="image/png"/>
  <manifest:file-entry manifest:full-path="Pictures/100000010000010C000000F7B42725BE.png" manifest:media-type="image/png"/>
  <manifest:file-entry manifest:full-path="Pictures/100000010000010C000000F76FA83F33.png" manifest:media-type="image/png"/>
  <manifest:file-entry manifest:full-path="Pictures/10000001000000120000001A3A8FA6A8.png" manifest:media-type="image/png"/>
  <manifest:file-entry manifest:full-path="Pictures/100000010000003300000029980FDAA1.png" manifest:media-type="image/png"/>
  <manifest:file-entry manifest:full-path="Pictures/10000001000002260000017B82F5F364.png" manifest:media-type="image/png"/>
  <manifest:file-entry manifest:full-path="Pictures/10000001000000120000001AFC37CAA4.png" manifest:media-type="image/png"/>
  <manifest:file-entry manifest:full-path="Pictures/100000010000001B0000001A4BCB55D3.png" manifest:media-type="image/png"/>
  <manifest:file-entry manifest:full-path="Pictures/100000010000001E0000001AAC08C601.png" manifest:media-type="image/png"/>
  <manifest:file-entry manifest:full-path="Pictures/10000001000000120000001A509FD19A.png" manifest:media-type="image/png"/>
  <manifest:file-entry manifest:full-path="Pictures/100000010000015C000000FBDBF517B8.png" manifest:media-type="image/png"/>
  <manifest:file-entry manifest:full-path="Pictures/10000001000001700000014D9E489F73.png" manifest:media-type="image/png"/>
  <manifest:file-entry manifest:full-path="Pictures/100000010000015C000000FBD3902262.png" manifest:media-type="image/png"/>
  <manifest:file-entry manifest:full-path="Pictures/1000000100000170000000EFE33EA780.png" manifest:media-type="image/png"/>
  <manifest:file-entry manifest:full-path="Pictures/100000010000016F000000EFA66FC01C.png" manifest:media-type="image/png"/>
  <manifest:file-entry manifest:full-path="Pictures/10000001000000330000002989EF1C8B.png" manifest:media-type="image/png"/>
  <manifest:file-entry manifest:full-path="Pictures/1000000100000029000000294FFE7E6F.png" manifest:media-type="image/png"/>
  <manifest:file-entry manifest:full-path="Pictures/100000010000001F00000029ABDB43DB.png" manifest:media-type="image/png"/>
  <manifest:file-entry manifest:full-path="Pictures/10000001000000120000001A14ECC5D0.png" manifest:media-type="image/png"/>
  <manifest:file-entry manifest:full-path="Pictures/10000001000000180000001A8D66C716.png" manifest:media-type="image/png"/>
  <manifest:file-entry manifest:full-path="Pictures/100000010000001B0000001A5AF08847.png" manifest:media-type="image/png"/>
  <manifest:file-entry manifest:full-path="Pictures/100000010000001E0000001A33B2392B.png" manifest:media-type="image/png"/>
  <manifest:file-entry manifest:full-path="Pictures/10000001000000180000001A1BC8BF9A.png" manifest:media-type="image/png"/>
  <manifest:file-entry manifest:full-path="Pictures/100000010000001E0000001A8CD9E73E.png" manifest:media-type="image/png"/>
  <manifest:file-entry manifest:full-path="Pictures/10000001000000150000001A09748C1E.png" manifest:media-type="image/png"/>
  <manifest:file-entry manifest:full-path="Pictures/10000001000000BA0000003245742DE8.png" manifest:media-type="image/png"/>
  <manifest:file-entry manifest:full-path="Pictures/100000010000005A000000331C0E49AB.png" manifest:media-type="image/png"/>
  <manifest:file-entry manifest:full-path="Pictures/100000010000005A00000033C60F4664.png" manifest:media-type="image/png"/>
  <manifest:file-entry manifest:full-path="Pictures/100000010000005C0000007161A22551.png" manifest:media-type="image/png"/>
  <manifest:file-entry manifest:full-path="Pictures/100000010000005A0000003381287B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Poppins SemiBold" svg:font-family="'Poppi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0ea5e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>
      <style:graphic-properties draw:stroke="solid" svg:stroke-width="0.026cm" svg:stroke-color="#4a7dba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loext:decorative="false"/>
    </style:style>
    <style:style style:name="gr50" style:family="graphic" style:parent-style-name="standard">
      <style:graphic-properties loext:decorative="false"/>
    </style:style>
    <style:style style:name="gr51" style:family="graphic" style:parent-style-name="standard">
      <style:graphic-properties draw:stroke="none" svg:stroke-width="0cm" draw:fill="solid" draw:fill-color="#e2e8f0" draw:textarea-horizontal-align="justify" draw:textarea-vertical-align="middle" draw:auto-grow-height="false" draw:fit-to-size="false" style:shrink-to-fit="false" fo:min-height="0cm" fo:min-width="0cm" fo:padding-top="0.013cm" fo:padding-bottom="0.013cm" fo:padding-left="0.254cm" fo:padding-right="0.254cm" fo:wrap-option="wrap" loext:decorative="false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solid" draw:fill-color="#e2e8f0" draw:textarea-horizontal-align="justify" draw:textarea-vertical-align="middle" draw:auto-grow-height="false" draw:fit-to-size="false" style:shrink-to-fit="false" fo:min-height="0cm" fo:min-width="0cm" fo:padding-top="0.053cm" fo:padding-bottom="0.053cm" fo:padding-left="0.254cm" fo:padding-right="0.254cm" fo:wrap-option="wrap" loext:decorative="false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106cm" svg:stroke-color="#ffffff" draw:stroke-linejoin="round" svg:stroke-linecap="butt" draw:fill="solid" draw:fill-color="#0ea5e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18" style:family="graphic" style:parent-style-name="standard">
      <style:graphic-properties draw:stroke="none" svg:stroke-width="0cm" draw:fill="solid" draw:fill-color="#757575" draw:textarea-horizontal-align="justify" draw:textarea-vertical-align="middle" draw:auto-grow-height="false" draw:fit-to-size="false" style:shrink-to-fit="false" fo:min-height="0cm" fo:min-width="0cm" fo:padding-top="0.013cm" fo:padding-bottom="0.013cm" fo:padding-left="0.254cm" fo:padding-right="0.254cm" fo:wrap-option="wrap" loext:decorative="false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8.761cm" style:use-optimal-column-width="false"/>
    </style:style>
    <style:style style:name="co2" style:family="table-column">
      <style:table-column-properties style:column-width="21.93cm" style:use-optimal-column-width="false"/>
    </style:style>
    <style:style style:name="ro1" style:family="table-row">
      <style:table-row-properties style:row-height="1.606cm" style:use-optimal-row-height="false"/>
    </style:style>
    <style:style style:name="ce1" style:family="table-cell">
      <loext:graphic-properties draw:fill="solid" draw:fill-color="#0f172a" draw:textarea-vertical-align="middle" fo:padding-top="0.07cm" fo:padding-bottom="0.07cm" fo:padding-left="0.176cm" fo:padding-right="0.176cm"/>
      <style:paragraph-properties fo:border="0.37pt solid #000000"/>
    </style:style>
    <style:style style:name="ce2" style:family="table-cell">
      <loext:graphic-properties draw:fill="solid" draw:fill-color="#cfd7e7" draw:textarea-vertical-align="middle" fo:padding-top="0.07cm" fo:padding-bottom="0.07cm" fo:padding-left="0.176cm" fo:padding-right="0.176cm"/>
      <style:paragraph-properties fo:border="0.37pt solid #000000"/>
    </style:style>
    <style:style style:name="ce3" style:family="table-cell">
      <loext:graphic-properties draw:fill="solid" draw:fill-color="#e8ecf4" draw:textarea-vertical-align="middle" fo:padding-top="0.07cm" fo:padding-bottom="0.07cm" fo:padding-left="0.176cm" fo:padding-right="0.176cm"/>
      <style:paragraph-properties fo:border="0.37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9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9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59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59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6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6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ea5e9"/>
      <style:paragraph-properties fo:text-align="center" style:font-independent-line-spacing="true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6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6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17" style:family="paragraph">
      <loext:graphic-properties draw:fill="solid" draw:fill-color="#e2e8f0"/>
      <style:paragraph-properties fo:text-align="center" style:font-independent-line-spacing="true"/>
      <style:text-properties fo:font-size="14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1" style:family="paragraph">
      <loext:graphic-properties draw:fill="solid" draw:fill-color="#757575"/>
      <style:paragraph-properties fo:text-align="center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51pt" fo:letter-spacing="normal" fo:language="en" fo:country="US" fo:font-style="normal" style:text-underline-style="none" fo:font-weight="bold" fo:background-color="transparent" style:font-name-asian="Poppins" style:font-size-asian="51pt" style:font-style-asian="normal" style:font-weight-asian="bold" style:font-name-complex="Poppi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38bdf8" loext:opacity="100%" style:text-outline="false" style:text-line-through-style="none" style:text-line-through-type="none" style:text-position="0% 100%" style:font-name="Lato Light" fo:font-size="21pt" fo:letter-spacing="normal" fo:language="en" fo:country="US" fo:font-style="normal" style:text-underline-style="none" fo:font-weight="normal" fo:background-color="transparent" style:font-name-asian="Lato Light" style:font-size-asian="21pt" style:font-style-asian="normal" style:font-weight-asian="normal" style:font-name-complex="Lato Light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3.5pt" fo:letter-spacing="normal" fo:language="en" fo:country="US" fo:font-style="normal" style:text-underline-style="none" fo:font-weight="normal" fo:background-color="transparent" style:font-name-asian="Lato" style:font-size-asian="13.5pt" style:font-style-asian="normal" style:font-weight-asian="normal" style:font-name-complex="Lato" style:font-size-complex="13.5pt" style:font-style-complex="normal" style:font-weight-complex="normal"/>
    </style:style>
    <style:style style:name="T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6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Poppins" fo:font-size="33pt" fo:letter-spacing="normal" fo:language="en" fo:country="US" fo:font-style="normal" style:text-underline-style="none" fo:font-weight="bold" fo:background-color="transparent" style:font-name-asian="Poppins" style:font-size-asian="33pt" style:font-style-asian="normal" style:font-weight-asian="bold" style:font-name-complex="Poppins" style:font-size-complex="33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Poppins" fo:font-size="21pt" fo:letter-spacing="normal" fo:language="en" fo:country="US" fo:font-style="normal" style:text-underline-style="none" fo:font-weight="bold" fo:background-color="transparent" style:font-name-asian="Poppins" style:font-size-asian="21pt" style:font-style-asian="normal" style:font-weight-asian="bold" style:font-name-complex="Poppins" style:font-size-complex="21pt" style:font-style-complex="normal" style:font-weight-complex="bold"/>
    </style:style>
    <style:style style:name="T9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bold" fo:background-color="transparent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11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Poppins" fo:font-size="16.5pt" fo:letter-spacing="normal" fo:language="en" fo:country="US" fo:font-style="normal" style:text-underline-style="none" fo:font-weight="bold" fo:background-color="transparent" style:font-name-asian="Poppins" style:font-size-asian="16.5pt" style:font-style-asian="normal" style:font-weight-asian="bold" style:font-name-complex="Poppins" style:font-size-complex="16.5pt" style:font-style-complex="normal" style:font-weight-complex="bold"/>
    </style:style>
    <style:style style:name="T12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SemiBold" fo:font-size="12pt" fo:letter-spacing="normal" fo:language="en" fo:country="US" fo:font-style="normal" style:text-underline-style="none" fo:font-weight="normal" fo:background-color="transparent" style:font-name-asian="Poppins SemiBold" style:font-size-asian="12pt" style:font-style-asian="normal" style:font-weight-asian="normal" style:font-name-complex="Poppins SemiBold" style:font-size-complex="12pt" style:font-style-complex="normal" style:font-weight-complex="normal"/>
    </style:style>
    <style:style style:name="T14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5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Lato" fo:font-size="15pt" fo:letter-spacing="normal" fo:language="en" fo:country="US" fo:font-style="italic" style:text-underline-style="none" fo:font-weight="normal" fo:background-color="transparent" style:font-name-asian="Lato" style:font-size-asian="15pt" style:font-style-asian="italic" style:font-weight-asian="normal" style:font-name-complex="Lato" style:font-size-complex="15pt" style:font-style-complex="italic" style:font-weight-complex="normal"/>
    </style:style>
    <style:style style:name="T16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Poppins" fo:font-size="12pt" fo:letter-spacing="normal" fo:language="en" fo:country="US" fo:font-style="normal" style:text-underline-style="none" fo:font-weight="bold" fo:background-color="transparent" style:font-name-asian="Poppins" style:font-size-asian="12pt" style:font-style-asian="normal" style:font-weight-asian="bold" style:font-name-complex="Poppins" style:font-size-complex="12pt" style:font-style-complex="normal" style:font-weight-complex="bold"/>
    </style:style>
    <style:style style:name="T17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0.5pt" fo:letter-spacing="normal" fo:language="en" fo:country="US" fo:font-style="normal" style:text-underline-style="none" fo:font-weight="normal" fo:background-color="transparent" style:font-name-asian="Lato" style:font-size-asian="10.5pt" style:font-style-asian="normal" style:font-weight-asian="normal" style:font-name-complex="Lato" style:font-size-complex="10.5pt" style:font-style-complex="normal" style:font-weight-complex="normal"/>
    </style:style>
    <style:style style:name="T1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9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6.5pt" fo:letter-spacing="normal" fo:language="en" fo:country="US" fo:font-style="normal" style:text-underline-style="none" fo:font-weight="bold" fo:background-color="transparent" style:font-name-asian="Lato" style:font-size-asian="16.5pt" style:font-style-asian="normal" style:font-weight-asian="bold" style:font-name-complex="Lato" style:font-size-complex="16.5pt" style:font-style-complex="normal" style:font-weight-complex="bold"/>
    </style:style>
    <style:style style:name="T2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16.5pt" fo:letter-spacing="normal" fo:language="en" fo:country="US" fo:font-style="normal" style:text-underline-style="none" fo:font-weight="normal" fo:background-color="transparent" style:font-name-asian="Lato" style:font-size-asian="16.5pt" style:font-style-asian="normal" style:font-weight-asian="normal" style:font-name-complex="Lato" style:font-size-complex="16.5pt" style:font-style-complex="normal" style:font-weight-complex="normal"/>
    </style:style>
    <style:style style:name="T2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2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bold" fo:background-color="transparent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3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Poppins" fo:font-size="60pt" fo:letter-spacing="normal" fo:language="en" fo:country="US" fo:font-style="normal" style:text-underline-style="none" fo:font-weight="bold" fo:background-color="transparent" style:font-name-asian="Poppins" style:font-size-asian="60pt" style:font-style-asian="normal" style:font-weight-asian="bold" style:font-name-complex="Poppins" style:font-size-complex="60pt" style:font-style-complex="normal" style:font-weight-complex="bold"/>
    </style:style>
    <style:style style:name="T2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Lato" fo:font-size="13.5pt" fo:letter-spacing="normal" fo:language="en" fo:country="US" fo:font-style="normal" style:text-underline-style="none" fo:font-weight="normal" fo:background-color="transparent" style:font-name-asian="Lato" style:font-size-asian="13.5pt" style:font-style-asian="normal" style:font-weight-asian="normal" style:font-name-complex="Lato" style:font-size-complex="13.5pt" style:font-style-complex="normal" style:font-weight-complex="normal"/>
    </style:style>
    <style:style style:name="T2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Lato" fo:font-size="9.80000019073486pt" fo:letter-spacing="normal" fo:language="en" fo:country="US" fo:font-style="normal" style:text-underline-style="none" fo:font-weight="normal" fo:background-color="transparent" style:font-name-asian="Lato" style:font-size-asian="9.80000019073486pt" style:font-style-asian="normal" style:font-weight-asian="normal" style:font-name-complex="Lato" style:font-size-complex="9.80000019073486pt" style:font-style-complex="normal" style:font-weight-complex="normal"/>
    </style:style>
    <style:style style:name="T26" style:family="text">
      <style:text-properties fo:font-variant="normal" fo:text-transform="none" fo:color="#4f46e5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85;p13" draw:style-name="gr1" draw:text-style-name="P1" draw:layer="layout" svg:width="33.866cm" svg:height="15.874cm" svg:x="0cm" svg:y="0cm">
          <draw:image xlink:href="Pictures/1000000100000500000002585DD46150.png" xlink:type="simple" xlink:show="embed" xlink:actuate="onLoad" draw:mime-type="image/png">
            <text:p/>
          </draw:image>
          <svg:desc>image.png</svg:desc>
        </draw:frame>
        <draw:custom-shape draw:name="Google Shape;86;p13" draw:style-name="gr2" draw:text-style-name="P3" draw:layer="layout" svg:width="19.669cm" svg:height="4.707cm" draw:transform="skewX (0.00261799387799149) rotate (0.00261799387799149) translate (6cm 2.22cm)">
          <text:p text:style-name="P2"><text:span text:style-name="T1">Intelligent Lecture</text:span><text:span text:style-name="T2"> <text:s text:c="2"/></text:span><text:span text:style-name="T1">Notes Ass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3" draw:text-style-name="P5" draw:layer="layout" svg:width="24.949cm" svg:height="2.825cm" svg:x="4.458cm" svg:y="9.271cm">
          <text:p text:style-name="P4"><text:span text:style-name="T3">An AI-Powered Study Companion using Retrieval-Augmented Generation (RA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4" draw:text-style-name="P7" draw:layer="layout" svg:width="17.473cm" svg:height="0.572cm" svg:x="8.044cm" svg:y="12.337cm">
          <text:p text:style-name="P6"><text:span text:style-name="T4"><text:s text:c="18"/></text:span><text:span text:style-name="T4">Team 5 <text:s text:c="17"/>Groq • LangChain • FAISS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draw:style-name="gr1" draw:text-style-name="P1" draw:layer="layout" svg:width="0.608cm" svg:height="0.475cm" svg:x="9.856cm" svg:y="12.423cm">
          <draw:image xlink:href="Pictures/100000010000001800000013D11B9117.png" xlink:type="simple" xlink:show="embed" xlink:actuate="onLoad" draw:mime-type="image/png">
            <text:p/>
          </draw:image>
          <svg:desc>image.png</svg:desc>
        </draw:frame>
        <draw:frame draw:name="Google Shape;90;p13" draw:style-name="gr1" draw:text-style-name="P1" draw:layer="layout" svg:width="0.475cm" svg:height="0.475cm" svg:x="14.458cm" svg:y="12.423cm">
          <draw:image xlink:href="Pictures/100000010000001300000013ACFB3196.png" xlink:type="simple" xlink:show="embed" xlink:actuate="onLoad" draw:mime-type="image/png">
            <text:p/>
          </draw:image>
          <svg:desc>image.png</svg:desc>
        </draw:frame>
        <presentation:notes draw:style-name="dp2">
          <draw:frame draw:name="Google Shape;81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5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6;p14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97;p14" draw:style-name="gr1" draw:text-style-name="P1" draw:layer="layout" svg:width="14.551cm" svg:height="8.201cm" svg:x="1.588cm" svg:y="6.813cm">
          <draw:image xlink:href="Pictures/100000010000022600000137593B5ECB.png" xlink:type="simple" xlink:show="embed" xlink:actuate="onLoad" draw:mime-type="image/png">
            <text:p/>
          </draw:image>
          <svg:desc>image.png</svg:desc>
        </draw:frame>
        <draw:frame draw:name="Google Shape;98;p14" draw:style-name="gr1" draw:text-style-name="P1" draw:layer="layout" svg:width="14.551cm" svg:height="8.201cm" svg:x="17.727cm" svg:y="6.813cm">
          <draw:image xlink:href="Pictures/10000001000002260000013742D0EAAD.png" xlink:type="simple" xlink:show="embed" xlink:actuate="onLoad" draw:mime-type="image/png">
            <text:p/>
          </draw:image>
          <svg:desc>image.png</svg:desc>
        </draw:frame>
        <draw:custom-shape draw:name="Google Shape;99;p14" draw:style-name="gr6" draw:text-style-name="P10" draw:layer="layout" svg:width="11.059cm" svg:height="1.015cm" svg:x="3.995cm" svg:y="7.898cm">
          <text:p text:style-name="P9"><text:span text:style-name="T5">Introduction &amp; 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7" draw:text-style-name="P10" draw:layer="layout" svg:width="11.059cm" svg:height="1.015cm" svg:x="3.995cm" svg:y="9.406cm">
          <text:p text:style-name="P9"><text:span text:style-name="T5">Project Overview &amp;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8" draw:text-style-name="P10" draw:layer="layout" svg:width="11.059cm" svg:height="1.015cm" svg:x="3.995cm" svg:y="10.914cm">
          <text:p text:style-name="P9"><text:span text:style-name="T5">Key Features &amp; Tech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9" draw:text-style-name="P10" draw:layer="layout" svg:width="11.059cm" svg:height="1.015cm" svg:x="3.995cm" svg:y="12.422cm">
          <text:p text:style-name="P9"><text:span text:style-name="T5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10" draw:text-style-name="P10" draw:layer="layout" svg:width="11.059cm" svg:height="1.015cm" svg:x="20.135cm" svg:y="7.898cm">
          <text:p text:style-name="P9"><text:span text:style-name="T5">Working Methodology &amp;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11" draw:text-style-name="P10" draw:layer="layout" svg:width="11.059cm" svg:height="1.015cm" svg:x="20.135cm" svg:y="9.406cm">
          <text:p text:style-name="P9"><text:span text:style-name="T5">Results &amp; Demo Screensh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12" draw:text-style-name="P10" draw:layer="layout" svg:width="11.059cm" svg:height="1.015cm" svg:x="20.135cm" svg:y="10.914cm">
          <text:p text:style-name="P9"><text:span text:style-name="T5">Applications &amp; Advant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13" draw:text-style-name="P10" draw:layer="layout" svg:width="11.059cm" svg:height="1.015cm" svg:x="20.135cm" svg:y="12.422cm">
          <text:p text:style-name="P9"><text:span text:style-name="T5">Future Scope &amp; 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4" draw:style-name="gr1" draw:text-style-name="P1" draw:layer="layout" svg:width="0.634cm" svg:height="0.687cm" svg:x="2.672cm" svg:y="8.004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08;p14" draw:style-name="gr1" draw:text-style-name="P1" draw:layer="layout" svg:width="0.634cm" svg:height="0.687cm" svg:x="2.672cm" svg:y="9.512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09;p14" draw:style-name="gr1" draw:text-style-name="P1" draw:layer="layout" svg:width="0.634cm" svg:height="0.687cm" svg:x="2.672cm" svg:y="11.02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10;p14" draw:style-name="gr1" draw:text-style-name="P1" draw:layer="layout" svg:width="0.634cm" svg:height="0.687cm" svg:x="2.672cm" svg:y="12.528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11;p14" draw:style-name="gr1" draw:text-style-name="P1" draw:layer="layout" svg:width="0.634cm" svg:height="0.687cm" svg:x="18.812cm" svg:y="8.004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12;p14" draw:style-name="gr1" draw:text-style-name="P1" draw:layer="layout" svg:width="0.634cm" svg:height="0.687cm" svg:x="18.812cm" svg:y="9.512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13;p14" draw:style-name="gr1" draw:text-style-name="P1" draw:layer="layout" svg:width="0.634cm" svg:height="0.687cm" svg:x="18.812cm" svg:y="11.02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frame draw:name="Google Shape;114;p14" draw:style-name="gr1" draw:text-style-name="P1" draw:layer="layout" svg:width="0.634cm" svg:height="0.687cm" svg:x="18.812cm" svg:y="12.528cm">
          <draw:image xlink:href="Pictures/10000001000000180000001AD813F462.png" xlink:type="simple" xlink:show="embed" xlink:actuate="onLoad" draw:mime-type="image/png">
            <text:p/>
          </draw:image>
          <svg:desc>image.png</svg:desc>
        </draw:frame>
        <draw:custom-shape draw:name="Google Shape;115;p14" draw:style-name="gr14" draw:text-style-name="P7" draw:layer="layout" svg:width="31.67cm" svg:height="1.398cm" svg:x="2.117cm" svg:y="1.588cm">
          <text:p text:style-name="P6"><text:span text:style-name="T6">PRESENTATION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p2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2:notes" draw:style-name="gr5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21;p15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122;p15" draw:style-name="gr1" draw:text-style-name="P1" draw:layer="layout" svg:width="14.551cm" svg:height="9.842cm" svg:x="1.588cm" svg:y="5.993cm">
          <draw:image xlink:href="Pictures/10000001000002260000017505F983A8.png" xlink:type="simple" xlink:show="embed" xlink:actuate="onLoad" draw:mime-type="image/png">
            <text:p/>
          </draw:image>
          <svg:desc>image.png</svg:desc>
        </draw:frame>
        <draw:frame draw:name="Google Shape;123;p15" draw:style-name="gr1" draw:text-style-name="P1" draw:layer="layout" svg:width="14.551cm" svg:height="9.842cm" svg:x="17.727cm" svg:y="5.993cm">
          <draw:image xlink:href="Pictures/10000001000002260000017590D4F16F.png" xlink:type="simple" xlink:show="embed" xlink:actuate="onLoad" draw:mime-type="image/png">
            <text:p/>
          </draw:image>
          <svg:desc>image.png</svg:desc>
        </draw:frame>
        <draw:custom-shape draw:name="Google Shape;124;p15" draw:style-name="gr16" draw:text-style-name="P7" draw:layer="layout" svg:width="13.001cm" svg:height="0.89cm" svg:x="2.672cm" svg:y="7.078cm">
          <text:p text:style-name="P6"><text:span text:style-name="T8">The 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17" draw:text-style-name="P7" draw:layer="layout" svg:width="13.001cm" svg:height="0.89cm" svg:x="18.812cm" svg:y="7.078cm">
          <text:p text:style-name="P6"><text:span text:style-name="T8">Proposed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5" draw:style-name="gr18" draw:text-style-name="P10" draw:layer="layout" svg:width="12.382cm" svg:height="4.063cm" svg:x="18.812cm" svg:y="8.718cm">
          <text:p text:style-name="P9"><text:span text:style-name="T5">Develop an </text:span><text:span text:style-name="T9">AI-powered assistant</text:span><text:span text:style-name="T5"> that understands lecture notes and provides accurate, context-aware answers using </text:span><text:span text:style-name="T9">RAG</text:span><text:span text:style-name="T5"> technolog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19" draw:text-style-name="P10" draw:layer="layout" svg:width="11.059cm" svg:height="1.015cm" svg:x="3.995cm" svg:y="8.718cm">
          <text:p text:style-name="P9"><text:span text:style-name="T5">Searching notes is time-consu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20" draw:text-style-name="P10" draw:layer="layout" svg:width="11.059cm" svg:height="1.015cm" svg:x="3.995cm" svg:y="10.226cm">
          <text:p text:style-name="P9"><text:span text:style-name="T5">Traditional search lacks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21" draw:text-style-name="P10" draw:layer="layout" svg:width="11.059cm" svg:height="1.015cm" svg:x="3.995cm" svg:y="11.734cm">
          <text:p text:style-name="P9"><text:span text:style-name="T5">Revision is often ineffic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22" draw:text-style-name="P10" draw:layer="layout" svg:width="11.059cm" svg:height="1.015cm" svg:x="3.995cm" svg:y="13.242cm">
          <text:p text:style-name="P9"><text:span text:style-name="T5">Limited interactive study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5" draw:style-name="gr1" draw:text-style-name="P1" draw:layer="layout" svg:width="0.634cm" svg:height="0.687cm" svg:x="2.672cm" svg:y="8.824cm">
          <draw:image xlink:href="Pictures/10000001000000180000001A90DBACA4.png" xlink:type="simple" xlink:show="embed" xlink:actuate="onLoad" draw:mime-type="image/png">
            <text:p/>
          </draw:image>
          <svg:desc>image.png</svg:desc>
        </draw:frame>
        <draw:frame draw:name="Google Shape;132;p15" draw:style-name="gr1" draw:text-style-name="P1" draw:layer="layout" svg:width="0.634cm" svg:height="0.687cm" svg:x="2.672cm" svg:y="10.332cm">
          <draw:image xlink:href="Pictures/10000001000000180000001AD02BAEE5.png" xlink:type="simple" xlink:show="embed" xlink:actuate="onLoad" draw:mime-type="image/png">
            <text:p/>
          </draw:image>
          <svg:desc>image.png</svg:desc>
        </draw:frame>
        <draw:frame draw:name="Google Shape;133;p15" draw:style-name="gr1" draw:text-style-name="P1" draw:layer="layout" svg:width="0.634cm" svg:height="0.687cm" svg:x="2.672cm" svg:y="11.84cm">
          <draw:image xlink:href="Pictures/10000001000000180000001A668E817E.png" xlink:type="simple" xlink:show="embed" xlink:actuate="onLoad" draw:mime-type="image/png">
            <text:p/>
          </draw:image>
          <svg:desc>image.png</svg:desc>
        </draw:frame>
        <draw:frame draw:name="Google Shape;134;p15" draw:style-name="gr1" draw:text-style-name="P1" draw:layer="layout" svg:width="0.634cm" svg:height="0.687cm" svg:x="2.672cm" svg:y="13.348cm">
          <draw:image xlink:href="Pictures/10000001000000180000001A42154B88.png" xlink:type="simple" xlink:show="embed" xlink:actuate="onLoad" draw:mime-type="image/png">
            <text:p/>
          </draw:image>
          <svg:desc>image.png</svg:desc>
        </draw:frame>
        <draw:custom-shape draw:name="Google Shape;135;p15" draw:style-name="gr23" draw:text-style-name="P7" draw:layer="layout" svg:width="31.67cm" svg:height="1.398cm" svg:x="2.117cm" svg:y="1.588cm">
          <text:p text:style-name="P6"><text:span text:style-name="T6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3:notes" draw:style-name="gr5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41;p16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142;p16" draw:style-name="gr1" draw:text-style-name="P1" draw:layer="layout" svg:width="14.551cm" svg:height="10.582cm" svg:x="17.727cm" svg:y="5.622cm">
          <draw:image xlink:href="Pictures/1000000100000226000001914E76D5AA.png" xlink:type="simple" xlink:show="embed" xlink:actuate="onLoad" draw:mime-type="image/png">
            <text:p/>
          </draw:image>
          <svg:desc>image.png</svg:desc>
        </draw:frame>
        <draw:custom-shape draw:name="Google Shape;143;p16" draw:style-name="gr24" draw:text-style-name="P10" draw:layer="layout" svg:width="14.551cm" svg:height="3.047cm" svg:x="1.588cm" svg:y="6.628cm">
          <text:p text:style-name="P9"><text:span text:style-name="T5">The </text:span><text:span text:style-name="T10">Intelligent Lecture Notes Assistant</text:span><text:span text:style-name="T5"> is a Streamlit-based web application designed to bridge the gap between static PDFs and active lear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6" draw:style-name="gr1" draw:text-style-name="P1" draw:layer="layout" svg:width="14.551cm" svg:height="10.582cm" svg:x="17.727cm" svg:y="5.622cm">
          <draw:image xlink:href="Pictures/10000001000002260000019155D5C927.png" xlink:type="simple" xlink:show="embed" xlink:actuate="onLoad" draw:mime-type="image/png">
            <text:p/>
          </draw:image>
          <svg:desc>image.png</svg:desc>
        </draw:frame>
        <draw:custom-shape draw:name="Google Shape;145;p16" draw:style-name="gr25" draw:text-style-name="P10" draw:layer="layout" svg:width="13.228cm" svg:height="1.015cm" svg:x="2.91cm" svg:y="9.697cm">
          <text:p text:style-name="P9"><text:span text:style-name="T5">Upload and process lecture P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26" draw:text-style-name="P10" draw:layer="layout" svg:width="13.228cm" svg:height="1.015cm" svg:x="2.91cm" svg:y="11.205cm">
          <text:p text:style-name="P9"><text:span text:style-name="T5">Natural language Q&amp;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27" draw:text-style-name="P10" draw:layer="layout" svg:width="13.228cm" svg:height="1.015cm" svg:x="2.91cm" svg:y="12.713cm">
          <text:p text:style-name="P9"><text:span text:style-name="T5">Instant summary &amp; quiz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6" draw:style-name="gr28" draw:text-style-name="P10" draw:layer="layout" svg:width="13.228cm" svg:height="1.015cm" svg:x="2.91cm" svg:y="14.221cm">
          <text:p text:style-name="P9"><text:span text:style-name="T5">Context-driven AI respo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16" draw:style-name="gr1" draw:text-style-name="P1" draw:layer="layout" svg:width="0.634cm" svg:height="0.687cm" svg:x="1.588cm" svg:y="9.803cm">
          <draw:image xlink:href="Pictures/10000001000000180000001A7AE21F7F.png" xlink:type="simple" xlink:show="embed" xlink:actuate="onLoad" draw:mime-type="image/png">
            <text:p/>
          </draw:image>
          <svg:desc>image.png</svg:desc>
        </draw:frame>
        <draw:frame draw:name="Google Shape;150;p16" draw:style-name="gr1" draw:text-style-name="P1" draw:layer="layout" svg:width="0.793cm" svg:height="0.687cm" svg:x="1.588cm" svg:y="11.311cm">
          <draw:image xlink:href="Pictures/100000010000001E0000001AE464A34F.png" xlink:type="simple" xlink:show="embed" xlink:actuate="onLoad" draw:mime-type="image/png">
            <text:p/>
          </draw:image>
          <svg:desc>image.png</svg:desc>
        </draw:frame>
        <draw:frame draw:name="Google Shape;151;p16" draw:style-name="gr1" draw:text-style-name="P1" draw:layer="layout" svg:width="0.555cm" svg:height="0.687cm" svg:x="1.588cm" svg:y="12.819cm">
          <draw:image xlink:href="Pictures/10000001000000150000001AF8522D36.png" xlink:type="simple" xlink:show="embed" xlink:actuate="onLoad" draw:mime-type="image/png">
            <text:p/>
          </draw:image>
          <svg:desc>image.png</svg:desc>
        </draw:frame>
        <draw:frame draw:name="Google Shape;152;p16" draw:style-name="gr1" draw:text-style-name="P1" draw:layer="layout" svg:width="0.713cm" svg:height="0.687cm" svg:x="1.588cm" svg:y="14.327cm">
          <draw:image xlink:href="Pictures/100000010000001B0000001A8EA217E9.png" xlink:type="simple" xlink:show="embed" xlink:actuate="onLoad" draw:mime-type="image/png">
            <text:p/>
          </draw:image>
          <svg:desc>image.png</svg:desc>
        </draw:frame>
        <draw:custom-shape draw:name="Google Shape;153;p16" draw:style-name="gr29" draw:text-style-name="P7" draw:layer="layout" svg:width="31.67cm" svg:height="1.398cm" svg:x="2.117cm" svg:y="1.588cm">
          <text:p text:style-name="P6"><text:span text:style-name="T6">PROJEC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6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4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p4:notes" draw:style-name="gr5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59;p17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custom-shape draw:name="Google Shape;160;p17" draw:style-name="gr30" draw:text-style-name="P10" draw:layer="layout" svg:width="22.489cm" svg:height="1.015cm" svg:x="2.91cm" svg:y="7.144cm">
          <text:p text:style-name="P9"><text:span text:style-name="T10">AI Assistant:</text:span><text:span text:style-name="T5"> Build a high-performance study tool for stud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31" draw:text-style-name="P10" draw:layer="layout" svg:width="22.489cm" svg:height="1.015cm" svg:x="2.91cm" svg:y="8.652cm">
          <text:p text:style-name="P9"><text:span text:style-name="T10">Efficiency:</text:span><text:span text:style-name="T5"> Improve learning speed using RAG-based retriev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32" draw:text-style-name="P10" draw:layer="layout" svg:width="22.489cm" svg:height="1.015cm" svg:x="2.91cm" svg:y="10.16cm">
          <text:p text:style-name="P9"><text:span text:style-name="T10">Time Reduction:</text:span><text:span text:style-name="T5"> Minimize hours spent searching through lengthy no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7" draw:style-name="gr33" draw:text-style-name="P10" draw:layer="layout" svg:width="22.489cm" svg:height="1.015cm" svg:x="2.91cm" svg:y="11.668cm">
          <text:p text:style-name="P9"><text:span text:style-name="T10">Context Awareness:</text:span><text:span text:style-name="T5"> Ensure responses are derived directly from course materia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7" draw:style-name="gr34" draw:text-style-name="P10" draw:layer="layout" svg:width="22.489cm" svg:height="1.015cm" svg:x="2.91cm" svg:y="13.176cm">
          <text:p text:style-name="P9"><text:span text:style-name="T10">Enhancement:</text:span><text:span text:style-name="T5"> Provide automated flashcards, quizzes, and summa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17" draw:style-name="gr1" draw:text-style-name="P1" draw:layer="layout" svg:width="0.793cm" svg:height="0.687cm" svg:x="1.588cm" svg:y="7.25cm">
          <draw:image xlink:href="Pictures/100000010000001E0000001A824161A0.png" xlink:type="simple" xlink:show="embed" xlink:actuate="onLoad" draw:mime-type="image/png">
            <text:p/>
          </draw:image>
          <svg:desc>image.png</svg:desc>
        </draw:frame>
        <draw:frame draw:name="Google Shape;166;p17" draw:style-name="gr1" draw:text-style-name="P1" draw:layer="layout" svg:width="0.634cm" svg:height="0.687cm" svg:x="1.588cm" svg:y="8.758cm">
          <draw:image xlink:href="Pictures/10000001000000180000001A08522CF8.png" xlink:type="simple" xlink:show="embed" xlink:actuate="onLoad" draw:mime-type="image/png">
            <text:p/>
          </draw:image>
          <svg:desc>image.png</svg:desc>
        </draw:frame>
        <draw:frame draw:name="Google Shape;167;p17" draw:style-name="gr1" draw:text-style-name="P1" draw:layer="layout" svg:width="0.634cm" svg:height="0.687cm" svg:x="1.588cm" svg:y="10.266cm">
          <draw:image xlink:href="Pictures/10000001000000180000001AE1AA67A2.png" xlink:type="simple" xlink:show="embed" xlink:actuate="onLoad" draw:mime-type="image/png">
            <text:p/>
          </draw:image>
          <svg:desc>image.png</svg:desc>
        </draw:frame>
        <draw:frame draw:name="Google Shape;168;p17" draw:style-name="gr1" draw:text-style-name="P1" draw:layer="layout" svg:width="0.634cm" svg:height="0.687cm" svg:x="1.588cm" svg:y="11.774cm">
          <draw:image xlink:href="Pictures/10000001000000180000001AB71F7A54.png" xlink:type="simple" xlink:show="embed" xlink:actuate="onLoad" draw:mime-type="image/png">
            <text:p/>
          </draw:image>
          <svg:desc>image.png</svg:desc>
        </draw:frame>
        <draw:frame draw:name="Google Shape;169;p17" draw:style-name="gr1" draw:text-style-name="P1" draw:layer="layout" svg:width="0.634cm" svg:height="0.687cm" svg:x="1.588cm" svg:y="13.282cm">
          <draw:image xlink:href="Pictures/10000001000000180000001AC326C946.png" xlink:type="simple" xlink:show="embed" xlink:actuate="onLoad" draw:mime-type="image/png">
            <text:p/>
          </draw:image>
          <svg:desc>image.png</svg:desc>
        </draw:frame>
        <draw:custom-shape draw:name="Google Shape;170;p17" draw:style-name="gr35" draw:text-style-name="P7" draw:layer="layout" svg:width="31.67cm" svg:height="1.398cm" svg:x="2.117cm" svg:y="1.588cm">
          <text:p text:style-name="P6"><text:span text:style-name="T6">PROJECT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7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p5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7;p5:notes" draw:style-name="gr5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76;p18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177;p18" draw:style-name="gr1" draw:text-style-name="P1" draw:layer="layout" svg:width="9.7cm" svg:height="5.624cm" svg:x="1.588cm" svg:y="4.892cm">
          <draw:image xlink:href="Pictures/100000010000016F000000D608BB48F1.png" xlink:type="simple" xlink:show="embed" xlink:actuate="onLoad" draw:mime-type="image/png">
            <text:p/>
          </draw:image>
          <svg:desc>image.png</svg:desc>
        </draw:frame>
        <draw:frame draw:name="Google Shape;178;p18" draw:style-name="gr1" draw:text-style-name="P1" draw:layer="layout" svg:width="9.701cm" svg:height="5.624cm" svg:x="12.082cm" svg:y="4.892cm">
          <draw:image xlink:href="Pictures/1000000100000170000000D63E101C61.png" xlink:type="simple" xlink:show="embed" xlink:actuate="onLoad" draw:mime-type="image/png">
            <text:p/>
          </draw:image>
          <svg:desc>image.png</svg:desc>
        </draw:frame>
        <draw:frame draw:name="Google Shape;179;p18" draw:style-name="gr1" draw:text-style-name="P1" draw:layer="layout" svg:width="9.7cm" svg:height="5.624cm" svg:x="22.578cm" svg:y="4.892cm">
          <draw:image xlink:href="Pictures/100000010000016F000000D6497A5980.png" xlink:type="simple" xlink:show="embed" xlink:actuate="onLoad" draw:mime-type="image/png">
            <text:p/>
          </draw:image>
          <svg:desc>image.png</svg:desc>
        </draw:frame>
        <draw:frame draw:name="Google Shape;180;p18" draw:style-name="gr1" draw:text-style-name="P1" draw:layer="layout" svg:width="9.7cm" svg:height="5.624cm" svg:x="1.588cm" svg:y="11.311cm">
          <draw:image xlink:href="Pictures/100000010000016F000000D6CEAD4965.png" xlink:type="simple" xlink:show="embed" xlink:actuate="onLoad" draw:mime-type="image/png">
            <text:p/>
          </draw:image>
          <svg:desc>image.png</svg:desc>
        </draw:frame>
        <draw:frame draw:name="Google Shape;181;p18" draw:style-name="gr1" draw:text-style-name="P1" draw:layer="layout" svg:width="9.701cm" svg:height="5.624cm" svg:x="12.082cm" svg:y="11.311cm">
          <draw:image xlink:href="Pictures/1000000100000170000000D68F630B49.png" xlink:type="simple" xlink:show="embed" xlink:actuate="onLoad" draw:mime-type="image/png">
            <text:p/>
          </draw:image>
          <svg:desc>image.png</svg:desc>
        </draw:frame>
        <draw:frame draw:name="Google Shape;182;p18" draw:style-name="gr1" draw:text-style-name="P1" draw:layer="layout" svg:width="9.7cm" svg:height="5.624cm" svg:x="22.578cm" svg:y="11.311cm">
          <draw:image xlink:href="Pictures/100000010000016F000000D682F48A54.png" xlink:type="simple" xlink:show="embed" xlink:actuate="onLoad" draw:mime-type="image/png">
            <text:p/>
          </draw:image>
          <svg:desc>image.png</svg:desc>
        </draw:frame>
        <draw:frame draw:name="Google Shape;183;p18" draw:style-name="gr1" draw:text-style-name="P1" draw:layer="layout" svg:width="1.322cm" svg:height="1.057cm" svg:x="5.777cm" svg:y="5.713cm">
          <draw:image xlink:href="Pictures/1000000100000033000000298EC5237F.png" xlink:type="simple" xlink:show="embed" xlink:actuate="onLoad" draw:mime-type="image/png">
            <text:p/>
          </draw:image>
          <svg:desc>image.png</svg:desc>
        </draw:frame>
        <draw:custom-shape draw:name="Google Shape;184;p18" draw:style-name="gr36" draw:text-style-name="P13" draw:layer="layout" svg:width="8.463cm" svg:height="0.699cm" svg:x="2.206cm" svg:y="7.3cm">
          <text:p text:style-name="P11"><text:span text:style-name="T11">PDF 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8" draw:style-name="gr37" draw:text-style-name="P15" draw:layer="layout" svg:width="8.06cm" svg:height="1.623cm" svg:x="2.408cm" svg:y="8.596cm">
          <text:p text:style-name="P14"><text:span text:style-name="T12">Seamless ingestion of lecture materia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18" draw:style-name="gr1" draw:text-style-name="P1" draw:layer="layout" svg:width="1.322cm" svg:height="1.057cm" svg:x="16.271cm" svg:y="5.713cm">
          <draw:image xlink:href="Pictures/100000010000003300000029A48C1AFE.png" xlink:type="simple" xlink:show="embed" xlink:actuate="onLoad" draw:mime-type="image/png">
            <text:p/>
          </draw:image>
          <svg:desc>image.png</svg:desc>
        </draw:frame>
        <draw:custom-shape draw:name="Google Shape;187;p18" draw:style-name="gr38" draw:text-style-name="P13" draw:layer="layout" svg:width="8.463cm" svg:height="0.699cm" svg:x="12.701cm" svg:y="7.3cm">
          <text:p text:style-name="P11"><text:span text:style-name="T11">AI Q&amp;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8" draw:style-name="gr39" draw:text-style-name="P15" draw:layer="layout" svg:width="8.06cm" svg:height="0.811cm" svg:x="12.903cm" svg:y="8.596cm">
          <text:p text:style-name="P14"><text:span text:style-name="T12">Semantic answers via Groq LL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18" draw:style-name="gr1" draw:text-style-name="P1" draw:layer="layout" svg:width="0.793cm" svg:height="1.057cm" svg:x="27.031cm" svg:y="5.713cm">
          <draw:image xlink:href="Pictures/100000010000001F0000002917BEE144.png" xlink:type="simple" xlink:show="embed" xlink:actuate="onLoad" draw:mime-type="image/png">
            <text:p/>
          </draw:image>
          <svg:desc>image.png</svg:desc>
        </draw:frame>
        <draw:custom-shape draw:name="Google Shape;190;p18" draw:style-name="gr40" draw:text-style-name="P13" draw:layer="layout" svg:width="8.463cm" svg:height="0.699cm" svg:x="23.196cm" svg:y="7.3cm">
          <text:p text:style-name="P11"><text:span text:style-name="T11">Summ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8" draw:style-name="gr41" draw:text-style-name="P15" draw:layer="layout" svg:width="8.06cm" svg:height="0.811cm" svg:x="23.398cm" svg:y="8.596cm">
          <text:p text:style-name="P14"><text:span text:style-name="T12">Instant breakdown of complex topic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18" draw:style-name="gr1" draw:text-style-name="P1" draw:layer="layout" svg:width="1.057cm" svg:height="1.057cm" svg:x="5.909cm" svg:y="12.131cm">
          <draw:image xlink:href="Pictures/10000001000000290000002958D823F5.png" xlink:type="simple" xlink:show="embed" xlink:actuate="onLoad" draw:mime-type="image/png">
            <text:p/>
          </draw:image>
          <svg:desc>image.png</svg:desc>
        </draw:frame>
        <draw:custom-shape draw:name="Google Shape;193;p18" draw:style-name="gr42" draw:text-style-name="P13" draw:layer="layout" svg:width="8.463cm" svg:height="0.699cm" svg:x="2.206cm" svg:y="13.719cm">
          <text:p text:style-name="P11"><text:span text:style-name="T11">Quiz/MC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8" draw:style-name="gr43" draw:text-style-name="P15" draw:layer="layout" svg:width="8.06cm" svg:height="0.811cm" svg:x="2.408cm" svg:y="15.015cm">
          <text:p text:style-name="P14"><text:span text:style-name="T12">Auto-generated practice te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18" draw:style-name="gr1" draw:text-style-name="P1" draw:layer="layout" svg:width="0.925cm" svg:height="1.057cm" svg:x="16.47cm" svg:y="12.131cm">
          <draw:image xlink:href="Pictures/100000010000002400000029551D4756.png" xlink:type="simple" xlink:show="embed" xlink:actuate="onLoad" draw:mime-type="image/png">
            <text:p/>
          </draw:image>
          <svg:desc>image.png</svg:desc>
        </draw:frame>
        <draw:custom-shape draw:name="Google Shape;196;p18" draw:style-name="gr44" draw:text-style-name="P13" draw:layer="layout" svg:width="8.463cm" svg:height="0.699cm" svg:x="12.701cm" svg:y="13.719cm">
          <text:p text:style-name="P11"><text:span text:style-name="T11">Flashc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8" draw:style-name="gr45" draw:text-style-name="P15" draw:layer="layout" svg:width="8.06cm" svg:height="0.811cm" svg:x="12.903cm" svg:y="15.015cm">
          <text:p text:style-name="P14"><text:span text:style-name="T12">Revision aids for active reca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18" draw:style-name="gr1" draw:text-style-name="P1" draw:layer="layout" svg:width="0.925cm" svg:height="1.057cm" svg:x="26.965cm" svg:y="12.131cm">
          <draw:image xlink:href="Pictures/1000000100000024000000298A62AB38.png" xlink:type="simple" xlink:show="embed" xlink:actuate="onLoad" draw:mime-type="image/png">
            <text:p/>
          </draw:image>
          <svg:desc>image.png</svg:desc>
        </draw:frame>
        <draw:custom-shape draw:name="Google Shape;199;p18" draw:style-name="gr46" draw:text-style-name="P13" draw:layer="layout" svg:width="8.463cm" svg:height="0.699cm" svg:x="23.196cm" svg:y="13.719cm">
          <text:p text:style-name="P11"><text:span text:style-name="T11">FAISS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8" draw:style-name="gr47" draw:text-style-name="P15" draw:layer="layout" svg:width="8.06cm" svg:height="0.811cm" svg:x="23.398cm" svg:y="15.015cm">
          <text:p text:style-name="P14"><text:span text:style-name="T12">Ultra-fast semantic vector retriev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8" draw:style-name="gr48" draw:text-style-name="P7" draw:layer="layout" svg:width="31.67cm" svg:height="1.398cm" svg:x="2.117cm" svg:y="1.588cm">
          <text:p text:style-name="P6"><text:span text:style-name="T6">KEY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8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6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p6:notes" draw:style-name="gr5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207;p19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custom-shape draw:name="Google Shape;208;p19" draw:style-name="gr49" draw:text-style-name="P16" draw:layer="layout" svg:width="30.691cm" svg:height="11.244cm" svg:x="1.588cm" svg:y="5.292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9;p19" draw:style-name="gr50" draw:layer="layout" svg:width="30.69cm" svg:height="11.241cm" svg:x="1.588cm" svg:y="5.29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Technology</text:span></text:p>
              </table:table-cell>
              <table:table-cell>
                <text:p text:style-name="P6"><text:span text:style-name="T13">Purpos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4">Python</text:span></text:p>
              </table:table-cell>
              <table:table-cell>
                <text:p text:style-name="P6"><text:span text:style-name="T14">Core programming language for backend logic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4">Streamlit</text:span></text:p>
              </table:table-cell>
              <table:table-cell>
                <text:p text:style-name="P6"><text:span text:style-name="T14">User-friendly web interface and UI components.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4">LangChain</text:span></text:p>
              </table:table-cell>
              <table:table-cell>
                <text:p text:style-name="P6"><text:span text:style-name="T14">Orchestration framework for the RAG pipeline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4">FAISS</text:span></text:p>
              </table:table-cell>
              <table:table-cell>
                <text:p text:style-name="P6"><text:span text:style-name="T14">Vector database for high-speed similarity search.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4">HuggingFace</text:span></text:p>
              </table:table-cell>
              <table:table-cell>
                <text:p text:style-name="P6"><text:span text:style-name="T14">State-of-the-art text embeddings generation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4">Groq LLM</text:span></text:p>
              </table:table-cell>
              <table:table-cell>
                <text:p text:style-name="P6"><text:span text:style-name="T14">High-speed inference for response generation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10;p19" draw:style-name="gr51" draw:text-style-name="P17" draw:layer="layout" svg:width="8.76cm" svg:height="0.025cm" svg:x="1.588cm" svg:y="6.99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9" draw:style-name="gr51" draw:text-style-name="P17" draw:layer="layout" svg:width="21.93cm" svg:height="0.025cm" svg:x="10.349cm" svg:y="6.99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9" draw:style-name="gr51" draw:text-style-name="P17" draw:layer="layout" svg:width="8.76cm" svg:height="0.025cm" svg:x="1.588cm" svg:y="8.58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9" draw:style-name="gr51" draw:text-style-name="P17" draw:layer="layout" svg:width="21.93cm" svg:height="0.025cm" svg:x="10.349cm" svg:y="8.58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9" draw:style-name="gr51" draw:text-style-name="P17" draw:layer="layout" svg:width="8.76cm" svg:height="0.025cm" svg:x="1.588cm" svg:y="10.173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9" draw:style-name="gr51" draw:text-style-name="P17" draw:layer="layout" svg:width="21.93cm" svg:height="0.025cm" svg:x="10.349cm" svg:y="10.173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9" draw:style-name="gr51" draw:text-style-name="P17" draw:layer="layout" svg:width="8.76cm" svg:height="0.025cm" svg:x="1.588cm" svg:y="11.761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9" draw:style-name="gr51" draw:text-style-name="P17" draw:layer="layout" svg:width="21.93cm" svg:height="0.025cm" svg:x="10.349cm" svg:y="11.761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9" draw:style-name="gr51" draw:text-style-name="P17" draw:layer="layout" svg:width="8.76cm" svg:height="0.025cm" svg:x="1.588cm" svg:y="13.34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9" draw:style-name="gr51" draw:text-style-name="P17" draw:layer="layout" svg:width="21.93cm" svg:height="0.025cm" svg:x="10.349cm" svg:y="13.34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9" draw:style-name="gr51" draw:text-style-name="P17" draw:layer="layout" svg:width="8.76cm" svg:height="0.025cm" svg:x="1.588cm" svg:y="14.93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9" draw:style-name="gr51" draw:text-style-name="P17" draw:layer="layout" svg:width="21.93cm" svg:height="0.025cm" svg:x="10.349cm" svg:y="14.93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9" draw:style-name="gr52" draw:text-style-name="P7" draw:layer="layout" svg:width="31.67cm" svg:height="1.398cm" svg:x="2.117cm" svg:y="1.588cm">
          <text:p text:style-name="P6"><text:span text:style-name="T6">TECHNOLOGY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9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p7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5;p7:notes" draw:style-name="gr5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228;p20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229;p20" draw:style-name="gr1" draw:text-style-name="P1" draw:layer="layout" svg:width="7.077cm" svg:height="6.513cm" svg:x="1.588cm" svg:y="6.44cm">
          <draw:image xlink:href="Pictures/100000010000010C000000F713EF021A.png" xlink:type="simple" xlink:show="embed" xlink:actuate="onLoad" draw:mime-type="image/png">
            <text:p/>
          </draw:image>
          <svg:desc>image.png</svg:desc>
        </draw:frame>
        <draw:frame draw:name="Google Shape;230;p20" draw:style-name="gr1" draw:text-style-name="P1" draw:layer="layout" svg:width="7.077cm" svg:height="6.513cm" svg:x="9.459cm" svg:y="6.44cm">
          <draw:image xlink:href="Pictures/100000010000010C000000F7B42725BE.png" xlink:type="simple" xlink:show="embed" xlink:actuate="onLoad" draw:mime-type="image/png">
            <text:p/>
          </draw:image>
          <svg:desc>image.png</svg:desc>
        </draw:frame>
        <draw:frame draw:name="Google Shape;231;p20" draw:style-name="gr1" draw:text-style-name="P1" draw:layer="layout" svg:width="7.077cm" svg:height="6.513cm" svg:x="17.33cm" svg:y="6.44cm">
          <draw:image xlink:href="Pictures/100000010000010C000000F73504B2C3.png" xlink:type="simple" xlink:show="embed" xlink:actuate="onLoad" draw:mime-type="image/png">
            <text:p/>
          </draw:image>
          <svg:desc>image.png</svg:desc>
        </draw:frame>
        <draw:frame draw:name="Google Shape;232;p20" draw:style-name="gr1" draw:text-style-name="P1" draw:layer="layout" svg:width="7.077cm" svg:height="6.513cm" svg:x="25.202cm" svg:y="6.44cm">
          <draw:image xlink:href="Pictures/100000010000010C000000F76FA83F33.png" xlink:type="simple" xlink:show="embed" xlink:actuate="onLoad" draw:mime-type="image/png">
            <text:p/>
          </draw:image>
          <svg:desc>image.png</svg:desc>
        </draw:frame>
        <draw:custom-shape draw:name="Google Shape;233;p20" draw:style-name="gr53" draw:text-style-name="P15" draw:layer="layout" svg:width="30.691cm" svg:height="1.015cm" svg:x="1.588cm" svg:y="14.012cm">
          <text:p text:style-name="P14"><text:span text:style-name="T15">Context is retrieved dynamically before LLM generation for maximum accurac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0" draw:style-name="gr54" draw:text-style-name="P13" draw:layer="layout" svg:width="5.708cm" svg:height="0.699cm" svg:x="2.272cm" svg:y="9.059cm">
          <text:p text:style-name="P11"><text:span text:style-name="T11">User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0" draw:style-name="gr55" draw:text-style-name="P15" draw:layer="layout" svg:width="5.436cm" svg:height="1.623cm" svg:x="2.408cm" svg:y="10.356cm">
          <text:p text:style-name="P14"><text:span text:style-name="T12">Uploads PDF &amp; asks ques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0" draw:style-name="gr56" draw:text-style-name="P13" draw:layer="layout" svg:width="5.708cm" svg:height="0.699cm" svg:x="10.143cm" svg:y="9.059cm">
          <text:p text:style-name="P11"><text:span text:style-name="T11">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0" draw:style-name="gr57" draw:text-style-name="P15" draw:layer="layout" svg:width="5.436cm" svg:height="1.623cm" svg:x="10.279cm" svg:y="10.356cm">
          <text:p text:style-name="P14"><text:span text:style-name="T12">Extraction, Chunking &amp; Embeddin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0" draw:style-name="gr58" draw:text-style-name="P13" draw:layer="layout" svg:width="5.708cm" svg:height="0.699cm" svg:x="18.014cm" svg:y="9.059cm">
          <text:p text:style-name="P11"><text:span text:style-name="T11">Vector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0" draw:style-name="gr59" draw:text-style-name="P15" draw:layer="layout" svg:width="5.436cm" svg:height="1.623cm" svg:x="18.15cm" svg:y="10.356cm">
          <text:p text:style-name="P14"><text:span text:style-name="T12">FAISS retrieves relevant con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0" draw:style-name="gr60" draw:text-style-name="P13" draw:layer="layout" svg:width="5.708cm" svg:height="0.699cm" svg:x="25.886cm" svg:y="9.059cm">
          <text:p text:style-name="P11"><text:span text:style-name="T11">LLM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0" draw:style-name="gr61" draw:text-style-name="P15" draw:layer="layout" svg:width="5.436cm" svg:height="1.623cm" svg:x="26.022cm" svg:y="10.356cm">
          <text:p text:style-name="P14"><text:span text:style-name="T12">Groq generates the final respo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20" draw:style-name="gr1" draw:text-style-name="P1" draw:layer="layout" svg:width="0.925cm" svg:height="1.057cm" svg:x="4.663cm" svg:y="7.366cm">
          <draw:image xlink:href="Pictures/100000010000002400000029DD102543.png" xlink:type="simple" xlink:show="embed" xlink:actuate="onLoad" draw:mime-type="image/png">
            <text:p/>
          </draw:image>
          <svg:desc>image.png</svg:desc>
        </draw:frame>
        <draw:frame draw:name="Google Shape;243;p20" draw:style-name="gr1" draw:text-style-name="P1" draw:layer="layout" svg:width="1.322cm" svg:height="1.057cm" svg:x="12.336cm" svg:y="7.366cm">
          <draw:image xlink:href="Pictures/100000010000003300000029980FDAA1.png" xlink:type="simple" xlink:show="embed" xlink:actuate="onLoad" draw:mime-type="image/png">
            <text:p/>
          </draw:image>
          <svg:desc>image.png</svg:desc>
        </draw:frame>
        <draw:frame draw:name="Google Shape;244;p20" draw:style-name="gr1" draw:text-style-name="P1" draw:layer="layout" svg:width="1.057cm" svg:height="1.057cm" svg:x="20.34cm" svg:y="7.366cm">
          <draw:image xlink:href="Pictures/1000000100000029000000290A07AA78.png" xlink:type="simple" xlink:show="embed" xlink:actuate="onLoad" draw:mime-type="image/png">
            <text:p/>
          </draw:image>
          <svg:desc>image.png</svg:desc>
        </draw:frame>
        <draw:frame draw:name="Google Shape;245;p20" draw:style-name="gr1" draw:text-style-name="P1" draw:layer="layout" svg:width="1.057cm" svg:height="1.057cm" svg:x="28.211cm" svg:y="7.366cm">
          <draw:image xlink:href="Pictures/1000000100000029000000293FD5005A.png" xlink:type="simple" xlink:show="embed" xlink:actuate="onLoad" draw:mime-type="image/png">
            <text:p/>
          </draw:image>
          <svg:desc>image.png</svg:desc>
        </draw:frame>
        <draw:custom-shape draw:name="Google Shape;246;p20" draw:style-name="gr62" draw:text-style-name="P7" draw:layer="layout" svg:width="31.67cm" svg:height="1.398cm" svg:x="2.117cm" svg:y="1.588cm">
          <text:p text:style-name="P6"><text:span text:style-name="T6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0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5;p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6;p8:notes" draw:style-name="gr5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252;p21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custom-shape draw:name="Google Shape;253;p21" draw:style-name="gr63" draw:text-style-name="P17" draw:layer="layout" svg:width="30.691cm" svg:height="0.105cm" svg:x="1.588cm" svg:y="11.443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1" draw:style-name="gr64" draw:text-style-name="P13" draw:layer="layout" svg:width="3.866cm" svg:height="0.509cm" svg:x="1.495cm" svg:y="10.251cm">
          <text:p text:style-name="P11"><text:span text:style-name="T16">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1" draw:style-name="gr65" draw:text-style-name="P5" draw:layer="layout" svg:width="3.682cm" svg:height="0.704cm" svg:x="1.588cm" svg:y="12.235cm">
          <text:p text:style-name="P4"><text:span text:style-name="T17">Ingest 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1" draw:style-name="gr66" draw:text-style-name="P13" draw:layer="layout" svg:width="3.866cm" svg:height="0.509cm" svg:x="5.997cm" svg:y="10.251cm">
          <text:p text:style-name="P11"><text:span text:style-name="T16">Ex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1" draw:style-name="gr67" draw:text-style-name="P5" draw:layer="layout" svg:width="3.682cm" svg:height="0.704cm" svg:x="6.089cm" svg:y="12.235cm">
          <text:p text:style-name="P4"><text:span text:style-name="T17">PyPDFLo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1" draw:style-name="gr68" draw:text-style-name="P13" draw:layer="layout" svg:width="3.866cm" svg:height="0.509cm" svg:x="10.498cm" svg:y="10.251cm">
          <text:p text:style-name="P11"><text:span text:style-name="T16">Chu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1" draw:style-name="gr69" draw:text-style-name="P5" draw:layer="layout" svg:width="3.682cm" svg:height="0.704cm" svg:x="10.59cm" svg:y="12.235cm">
          <text:p text:style-name="P4"><text:span text:style-name="T17">Text Split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1" draw:style-name="gr70" draw:text-style-name="P13" draw:layer="layout" svg:width="3.866cm" svg:height="0.509cm" svg:x="14.999cm" svg:y="10.251cm">
          <text:p text:style-name="P11"><text:span text:style-name="T16">Emb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1" draw:style-name="gr71" draw:text-style-name="P5" draw:layer="layout" svg:width="3.682cm" svg:height="0.704cm" svg:x="15.091cm" svg:y="12.235cm">
          <text:p text:style-name="P4"><text:span text:style-name="T17">Ve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1" draw:style-name="gr72" draw:text-style-name="P13" draw:layer="layout" svg:width="3.866cm" svg:height="0.509cm" svg:x="19.5cm" svg:y="10.251cm">
          <text:p text:style-name="P11"><text:span text:style-name="T16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1" draw:style-name="gr73" draw:text-style-name="P5" draw:layer="layout" svg:width="3.682cm" svg:height="0.704cm" svg:x="19.592cm" svg:y="12.235cm">
          <text:p text:style-name="P4"><text:span text:style-name="T17">FAISS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1" draw:style-name="gr74" draw:text-style-name="P13" draw:layer="layout" svg:width="3.866cm" svg:height="0.509cm" svg:x="24.002cm" svg:y="10.251cm">
          <text:p text:style-name="P11"><text:span text:style-name="T16">Retrie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1" draw:style-name="gr75" draw:text-style-name="P5" draw:layer="layout" svg:width="3.682cm" svg:height="0.704cm" svg:x="24.094cm" svg:y="12.235cm">
          <text:p text:style-name="P4"><text:span text:style-name="T17">Simila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1" draw:style-name="gr76" draw:text-style-name="P13" draw:layer="layout" svg:width="3.866cm" svg:height="0.509cm" svg:x="28.503cm" svg:y="10.251cm">
          <text:p text:style-name="P11"><text:span text:style-name="T16">Gen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1" draw:style-name="gr77" draw:text-style-name="P5" draw:layer="layout" svg:width="3.682cm" svg:height="0.704cm" svg:x="28.595cm" svg:y="12.235cm">
          <text:p text:style-name="P4"><text:span text:style-name="T17">Groq L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1" draw:style-name="gr78" draw:text-style-name="P7" draw:layer="layout" svg:width="31.67cm" svg:height="1.398cm" svg:x="2.117cm" svg:y="1.588cm">
          <text:p text:style-name="P6"><text:span text:style-name="T6">WORKING 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1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1" draw:style-name="gr79" draw:text-style-name="P12" draw:layer="layout" svg:width="0.528cm" svg:height="0.528cm" svg:x="3.164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1;p21" draw:style-name="gr79" draw:text-style-name="P12" draw:layer="layout" svg:width="0.528cm" svg:height="0.528cm" svg:x="7.665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2;p21" draw:style-name="gr79" draw:text-style-name="P12" draw:layer="layout" svg:width="0.528cm" svg:height="0.528cm" svg:x="12.167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3;p21" draw:style-name="gr79" draw:text-style-name="P12" draw:layer="layout" svg:width="0.528cm" svg:height="0.528cm" svg:x="16.668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4;p21" draw:style-name="gr79" draw:text-style-name="P12" draw:layer="layout" svg:width="0.528cm" svg:height="0.528cm" svg:x="21.169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5;p21" draw:style-name="gr79" draw:text-style-name="P12" draw:layer="layout" svg:width="0.528cm" svg:height="0.528cm" svg:x="25.67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6;p21" draw:style-name="gr79" draw:text-style-name="P12" draw:layer="layout" svg:width="0.528cm" svg:height="0.528cm" svg:x="30.172cm" svg:y="11.179cm">
          <text:p text:style-name="P11"><text:span text:style-name="T7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249;p9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0;p9:notes" draw:style-name="gr5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frame draw:name="Google Shape;281;p22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282;p22" draw:style-name="gr1" draw:text-style-name="P1" draw:layer="layout" svg:width="14.551cm" svg:height="10.027cm" svg:x="1.588cm" svg:y="5.9cm">
          <draw:image xlink:href="Pictures/10000001000002260000017B95D28511.png" xlink:type="simple" xlink:show="embed" xlink:actuate="onLoad" draw:mime-type="image/png">
            <text:p/>
          </draw:image>
          <svg:desc>image.png</svg:desc>
        </draw:frame>
        <draw:frame draw:name="Google Shape;283;p22" draw:style-name="gr1" draw:text-style-name="P1" draw:layer="layout" svg:width="14.551cm" svg:height="10.027cm" svg:x="17.727cm" svg:y="5.9cm">
          <draw:image xlink:href="Pictures/10000001000002260000017B82F5F364.png" xlink:type="simple" xlink:show="embed" xlink:actuate="onLoad" draw:mime-type="image/png">
            <text:p/>
          </draw:image>
          <svg:desc>image.png</svg:desc>
        </draw:frame>
        <draw:custom-shape draw:name="Google Shape;284;p22" draw:style-name="gr80" draw:text-style-name="P7" draw:layer="layout" svg:width="13.001cm" svg:height="0.89cm" svg:x="2.672cm" svg:y="6.985cm">
          <text:p text:style-name="P6"><text:span text:style-name="T8">PDF &amp; Text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2" draw:style-name="gr81" draw:text-style-name="P7" draw:layer="layout" svg:width="13.001cm" svg:height="0.89cm" svg:x="18.812cm" svg:y="6.985cm">
          <text:p text:style-name="P6"><text:span text:style-name="T8">AI Retrieval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2" draw:style-name="gr82" draw:text-style-name="P10" draw:layer="layout" svg:width="11.059cm" svg:height="2.031cm" svg:x="3.995cm" svg:y="8.625cm">
          <text:p text:style-name="P9"><text:span text:style-name="T10">PyPDFLoader:</text:span><text:span text:style-name="T5"> Parses document struct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2" draw:style-name="gr83" draw:text-style-name="P10" draw:layer="layout" svg:width="11.059cm" svg:height="2.031cm" svg:x="3.995cm" svg:y="10.134cm">
          <text:p text:style-name="P9"><text:span text:style-name="T10">Recursive Splitting:</text:span><text:span text:style-name="T5"> Optimizes chunk sizes for RA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2" draw:style-name="gr84" draw:text-style-name="P10" draw:layer="layout" svg:width="11.059cm" svg:height="2.031cm" svg:x="3.995cm" svg:y="12.488cm">
          <text:p text:style-name="P9"><text:span text:style-name="T10">Pre-processing:</text:span><text:span text:style-name="T5"> Removes noise from extracted 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2" draw:style-name="gr85" draw:text-style-name="P10" draw:layer="layout" svg:width="11.059cm" svg:height="2.031cm" svg:x="20.135cm" svg:y="8.625cm">
          <text:p text:style-name="P9"><text:span text:style-name="T10">Semantic Mapping:</text:span><text:span text:style-name="T5"> Connects queries to document chun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2" draw:style-name="gr86" draw:text-style-name="P10" draw:layer="layout" svg:width="11.059cm" svg:height="2.031cm" svg:x="20.135cm" svg:y="10.98cm">
          <text:p text:style-name="P9"><text:span text:style-name="T10">Groq Integration:</text:span><text:span text:style-name="T5"> Sub-second inference spee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2" draw:style-name="gr87" draw:text-style-name="P10" draw:layer="layout" svg:width="11.059cm" svg:height="2.031cm" svg:x="20.135cm" svg:y="12.488cm">
          <text:p text:style-name="P9"><text:span text:style-name="T10">Hallucination Check:</text:span><text:span text:style-name="T5"> Grounded in con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22" draw:style-name="gr1" draw:text-style-name="P1" draw:layer="layout" svg:width="0.475cm" svg:height="0.687cm" svg:x="2.672cm" svg:y="8.731cm">
          <draw:image xlink:href="Pictures/10000001000000120000001AFC37CAA4.png" xlink:type="simple" xlink:show="embed" xlink:actuate="onLoad" draw:mime-type="image/png">
            <text:p/>
          </draw:image>
          <svg:desc>image.png</svg:desc>
        </draw:frame>
        <draw:frame draw:name="Google Shape;293;p22" draw:style-name="gr1" draw:text-style-name="P1" draw:layer="layout" svg:width="0.634cm" svg:height="0.687cm" svg:x="2.672cm" svg:y="10.239cm">
          <draw:image xlink:href="Pictures/10000001000000180000001A9FCB4036.png" xlink:type="simple" xlink:show="embed" xlink:actuate="onLoad" draw:mime-type="image/png">
            <text:p/>
          </draw:image>
          <svg:desc>image.png</svg:desc>
        </draw:frame>
        <draw:frame draw:name="Google Shape;294;p22" draw:style-name="gr1" draw:text-style-name="P1" draw:layer="layout" svg:width="0.713cm" svg:height="0.687cm" svg:x="2.672cm" svg:y="12.594cm">
          <draw:image xlink:href="Pictures/100000010000001B0000001A4BCB55D3.png" xlink:type="simple" xlink:show="embed" xlink:actuate="onLoad" draw:mime-type="image/png">
            <text:p/>
          </draw:image>
          <svg:desc>image.png</svg:desc>
        </draw:frame>
        <draw:frame draw:name="Google Shape;295;p22" draw:style-name="gr1" draw:text-style-name="P1" draw:layer="layout" svg:width="0.793cm" svg:height="0.687cm" svg:x="18.812cm" svg:y="8.731cm">
          <draw:image xlink:href="Pictures/100000010000001E0000001AAC08C601.png" xlink:type="simple" xlink:show="embed" xlink:actuate="onLoad" draw:mime-type="image/png">
            <text:p/>
          </draw:image>
          <svg:desc>image.png</svg:desc>
        </draw:frame>
        <draw:frame draw:name="Google Shape;296;p22" draw:style-name="gr1" draw:text-style-name="P1" draw:layer="layout" svg:width="0.475cm" svg:height="0.687cm" svg:x="18.812cm" svg:y="11.086cm">
          <draw:image xlink:href="Pictures/10000001000000120000001A509FD19A.png" xlink:type="simple" xlink:show="embed" xlink:actuate="onLoad" draw:mime-type="image/png">
            <text:p/>
          </draw:image>
          <svg:desc>image.png</svg:desc>
        </draw:frame>
        <draw:frame draw:name="Google Shape;297;p22" draw:style-name="gr1" draw:text-style-name="P1" draw:layer="layout" svg:width="0.634cm" svg:height="0.687cm" svg:x="18.812cm" svg:y="12.594cm">
          <draw:image xlink:href="Pictures/10000001000000180000001AF623641F.png" xlink:type="simple" xlink:show="embed" xlink:actuate="onLoad" draw:mime-type="image/png">
            <text:p/>
          </draw:image>
          <svg:desc>image.png</svg:desc>
        </draw:frame>
        <draw:custom-shape draw:name="Google Shape;298;p22" draw:style-name="gr88" draw:text-style-name="P7" draw:layer="layout" svg:width="31.67cm" svg:height="1.398cm" svg:x="2.117cm" svg:y="1.588cm">
          <text:p text:style-name="P6"><text:span text:style-name="T6">IMPLEMENTATION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2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p1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9;p10:notes" draw:style-name="gr5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frame draw:name="Google Shape;304;p23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305;p23" draw:style-name="gr1" draw:text-style-name="P1" draw:layer="layout" svg:width="19cm" svg:height="9.669cm" draw:transform="skewX (0.00279252680319093) rotate (0.00279252680319093) translate (1cm 4.053cm)">
          <draw:image xlink:href="Pictures/100000010000016F0000014DE756B6B4.png" xlink:type="simple" xlink:show="embed" xlink:actuate="onLoad" draw:mime-type="image/png">
            <text:p/>
          </draw:image>
          <svg:desc>image.png</svg:desc>
        </draw:frame>
        <draw:frame draw:name="Google Shape;306;p23" draw:style-name="gr1" draw:text-style-name="P1" draw:layer="layout" svg:width="7.018cm" svg:height="6.354cm" svg:x="24.082cm" svg:y="1.112cm">
          <draw:image xlink:href="Pictures/10000001000001700000014D9E489F73.png" xlink:type="simple" xlink:show="embed" xlink:actuate="onLoad" draw:mime-type="image/png">
            <text:p/>
          </draw:image>
          <svg:desc>image.png</svg:desc>
        </draw:frame>
        <draw:frame draw:name="Google Shape;308;p23" draw:style-name="gr1" draw:text-style-name="P1" draw:layer="layout" svg:width="9.118cm" svg:height="6.614cm" svg:x="1.879cm" svg:y="5.861cm">
          <draw:image xlink:href="Pictures/100000010000015B000000FB326246FC.png" xlink:type="simple" xlink:show="embed" xlink:actuate="onLoad" draw:mime-type="image/png">
            <text:p/>
          </draw:image>
          <svg:desc>image.png</svg:desc>
        </draw:frame>
        <draw:frame draw:name="Google Shape;309;p23" draw:style-name="gr1" draw:text-style-name="P1" draw:layer="layout" svg:width="9.118cm" svg:height="6.614cm" svg:x="12.373cm" svg:y="5.861cm">
          <draw:image xlink:href="Pictures/100000010000015C000000FBD3902262.png" xlink:type="simple" xlink:show="embed" xlink:actuate="onLoad" draw:mime-type="image/png">
            <text:p/>
          </draw:image>
          <svg:desc>image.png</svg:desc>
        </draw:frame>
        <draw:frame draw:name="Google Shape;310;p23" draw:style-name="gr1" draw:text-style-name="P1" draw:layer="layout" svg:width="9.118cm" svg:height="6.614cm" svg:x="22.869cm" svg:y="5.861cm">
          <draw:image xlink:href="Pictures/100000010000015B000000FB326246FC.png" xlink:type="simple" xlink:show="embed" xlink:actuate="onLoad" draw:mime-type="image/png">
            <text:p/>
          </draw:image>
          <svg:desc>image.png</svg:desc>
        </draw:frame>
        <draw:custom-shape draw:name="Google Shape;311;p23" draw:style-name="gr89" draw:text-style-name="P15" draw:layer="layout" svg:width="30.691cm" svg:height="1.015cm" svg:x="1.588cm" svg:y="14.883cm">
          <text:p text:style-name="P14"><text:span text:style-name="T18">Outcome: Fast, accurate, and interactive study assist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3" draw:style-name="gr90" draw:text-style-name="P13" draw:layer="layout" svg:width="9.574cm" svg:height="0.699cm" svg:x="6.5cm" svg:y="12.872cm">
          <text:p text:style-name="P11"><text:span text:style-name="T11">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3" draw:style-name="gr91" draw:text-style-name="P13" draw:layer="layout" svg:width="9.574cm" svg:height="0.699cm" svg:x="22.869cm" svg:y="6.5cm">
          <text:p text:style-name="P11"><text:span text:style-name="T11">Smart Quizz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 1" draw:style-name="gr1" draw:text-style-name="P1" draw:layer="layout" svg:width="7.018cm" svg:height="6.354cm" svg:x="23.982cm" svg:y="8.146cm">
          <draw:image xlink:href="Pictures/10000001000001700000014D9E489F73.png" xlink:type="simple" xlink:show="embed" xlink:actuate="onLoad" draw:mime-type="image/png">
            <text:p/>
          </draw:image>
          <svg:desc>image.png</svg:desc>
        </draw:frame>
        <draw:custom-shape draw:name="Google Shape;314;p23" draw:style-name="gr92" draw:text-style-name="P13" draw:layer="layout" svg:width="9.574cm" svg:height="0.699cm" svg:x="22.5cm" svg:y="13.301cm">
          <text:p text:style-name="P11"><text:span text:style-name="T11">Q&amp;A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23" draw:style-name="gr93" draw:text-style-name="P1" draw:layer="layout" svg:width="5.514cm" svg:height="4cm" svg:x="24.886cm" svg:y="2cm">
          <draw:image xlink:href="Pictures/100000010000015C000000FBDBF517B8.png" xlink:type="simple" xlink:show="embed" xlink:actuate="onLoad" draw:mime-type="image/png">
            <text:p text:style-name="P18"/>
          </draw:image>
          <svg:desc>image.png</svg:desc>
        </draw:frame>
        <draw:custom-shape draw:name="Google Shape;318;p23" draw:style-name="gr94" draw:text-style-name="P7" draw:layer="layout" svg:width="31.67cm" svg:height="1.398cm" svg:x="2.117cm" svg:y="1.588cm">
          <text:p text:style-name="P6"><text:span text:style-name="T6">DEMONSTRATI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3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5" draw:text-style-name="P19" draw:layer="layout" svg:width="17.5cm" svg:height="8.684cm" svg:x="2cm" svg:y="4.216cm">
          <draw:image xlink:href="Pictures/1000000100000774000003A83F4A6CCD.png" xlink:type="simple" xlink:show="embed" xlink:actuate="onLoad" draw:mime-type="image/png">
            <text:p/>
          </draw:image>
        </draw:frame>
        <draw:frame draw:name="Google Shape;317;p23" draw:style-name="gr1" draw:text-style-name="P1" draw:layer="layout" svg:width="6.238cm" svg:height="4.525cm" svg:x="24.387cm" svg:y="8.475cm">
          <draw:image xlink:href="Pictures/100000010000015B000000FB400691E2.png" xlink:type="simple" xlink:show="embed" xlink:actuate="onLoad" draw:mime-type="image/png">
            <text:p/>
          </draw:image>
          <svg:desc>image.png</svg:desc>
        </draw:frame>
        <presentation:notes draw:style-name="dp2">
          <draw:frame draw:name="Google Shape;301;p11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2;p11:notes" draw:style-name="gr5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324;p24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325;p24" draw:style-name="gr1" draw:text-style-name="P1" draw:layer="layout" svg:width="30.691cm" svg:height="2.306cm" svg:x="1.588cm" svg:y="13.441cm">
          <draw:image xlink:href="Pictures/100000010000048800000058665801A8.png" xlink:type="simple" xlink:show="embed" xlink:actuate="onLoad" draw:mime-type="image/png">
            <text:p/>
          </draw:image>
          <svg:desc>image.png</svg:desc>
        </draw:frame>
        <draw:frame draw:name="Google Shape;326;p24" draw:style-name="gr1" draw:text-style-name="P1" draw:layer="layout" svg:width="9.7cm" svg:height="6.301cm" svg:x="1.588cm" svg:y="6.08cm">
          <draw:image xlink:href="Pictures/100000010000016F000000EF00F396BE.png" xlink:type="simple" xlink:show="embed" xlink:actuate="onLoad" draw:mime-type="image/png">
            <text:p/>
          </draw:image>
          <svg:desc>image.png</svg:desc>
        </draw:frame>
        <draw:frame draw:name="Google Shape;327;p24" draw:style-name="gr1" draw:text-style-name="P1" draw:layer="layout" svg:width="9.701cm" svg:height="6.301cm" svg:x="12.082cm" svg:y="6.08cm">
          <draw:image xlink:href="Pictures/1000000100000170000000EFE33EA780.png" xlink:type="simple" xlink:show="embed" xlink:actuate="onLoad" draw:mime-type="image/png">
            <text:p/>
          </draw:image>
          <svg:desc>image.png</svg:desc>
        </draw:frame>
        <draw:frame draw:name="Google Shape;328;p24" draw:style-name="gr1" draw:text-style-name="P1" draw:layer="layout" svg:width="9.7cm" svg:height="6.301cm" svg:x="22.578cm" svg:y="6.08cm">
          <draw:image xlink:href="Pictures/100000010000016F000000EFA66FC01C.png" xlink:type="simple" xlink:show="embed" xlink:actuate="onLoad" draw:mime-type="image/png">
            <text:p/>
          </draw:image>
          <svg:desc>image.png</svg:desc>
        </draw:frame>
        <draw:custom-shape draw:name="Google Shape;329;p24" draw:style-name="gr96" draw:text-style-name="P15" draw:layer="layout" svg:width="29.315cm" svg:height="1.115cm" svg:x="2.275cm" svg:y="14.129cm">
          <text:p text:style-name="P14"><text:span text:style-name="T19">Interactive Learning:</text:span><text:span text:style-name="T20"> Moving from passive reading to active AI engag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24" draw:style-name="gr1" draw:text-style-name="P1" draw:layer="layout" svg:width="1.322cm" svg:height="1.057cm" svg:x="5.777cm" svg:y="6.901cm">
          <draw:image xlink:href="Pictures/10000001000000330000002989EF1C8B.png" xlink:type="simple" xlink:show="embed" xlink:actuate="onLoad" draw:mime-type="image/png">
            <text:p/>
          </draw:image>
          <svg:desc>image.png</svg:desc>
        </draw:frame>
        <draw:custom-shape draw:name="Google Shape;331;p24" draw:style-name="gr97" draw:text-style-name="P13" draw:layer="layout" svg:width="8.463cm" svg:height="0.699cm" svg:x="2.206cm" svg:y="8.488cm">
          <text:p text:style-name="P11"><text:span text:style-name="T11">Edu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4" draw:style-name="gr98" draw:text-style-name="P15" draw:layer="layout" svg:width="8.06cm" svg:height="1.623cm" svg:x="2.408cm" svg:y="9.785cm">
          <text:p text:style-name="P14"><text:span text:style-name="T12">Perfect for college students and smart digital lear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24" draw:style-name="gr1" draw:text-style-name="P1" draw:layer="layout" svg:width="1.057cm" svg:height="1.057cm" svg:x="16.404cm" svg:y="6.901cm">
          <draw:image xlink:href="Pictures/1000000100000029000000294FFE7E6F.png" xlink:type="simple" xlink:show="embed" xlink:actuate="onLoad" draw:mime-type="image/png">
            <text:p/>
          </draw:image>
          <svg:desc>image.png</svg:desc>
        </draw:frame>
        <draw:custom-shape draw:name="Google Shape;334;p24" draw:style-name="gr99" draw:text-style-name="P13" draw:layer="layout" svg:width="8.463cm" svg:height="0.699cm" svg:x="12.701cm" svg:y="8.488cm">
          <text:p text:style-name="P11"><text:span text:style-name="T11">Time Sa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4" draw:style-name="gr100" draw:text-style-name="P15" draw:layer="layout" svg:width="8.06cm" svg:height="1.623cm" svg:x="12.903cm" svg:y="9.785cm">
          <text:p text:style-name="P14"><text:span text:style-name="T12">Reduces preparation time for exams and viv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24" draw:style-name="gr1" draw:text-style-name="P1" draw:layer="layout" svg:width="0.793cm" svg:height="1.057cm" svg:x="27.031cm" svg:y="6.901cm">
          <draw:image xlink:href="Pictures/100000010000001F00000029ABDB43DB.png" xlink:type="simple" xlink:show="embed" xlink:actuate="onLoad" draw:mime-type="image/png">
            <text:p/>
          </draw:image>
          <svg:desc>image.png</svg:desc>
        </draw:frame>
        <draw:custom-shape draw:name="Google Shape;337;p24" draw:style-name="gr101" draw:text-style-name="P13" draw:layer="layout" svg:width="8.463cm" svg:height="0.699cm" svg:x="23.196cm" svg:y="8.488cm">
          <text:p text:style-name="P11"><text:span text:style-name="T11">Self-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4" draw:style-name="gr102" draw:text-style-name="P15" draw:layer="layout" svg:width="8.06cm" svg:height="1.623cm" svg:x="23.398cm" svg:y="9.785cm">
          <text:p text:style-name="P14"><text:span text:style-name="T12">Empowers students with personalized study pla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4" draw:style-name="gr103" draw:text-style-name="P7" draw:layer="layout" svg:width="31.67cm" svg:height="1.398cm" svg:x="2.117cm" svg:y="1.588cm">
          <text:p text:style-name="P6"><text:span text:style-name="T6">APPLICATIONS &amp; BENEF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4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1;p12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2;p12:notes" draw:style-name="gr5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frame draw:name="Google Shape;345;p25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custom-shape draw:name="Google Shape;346;p25" draw:style-name="gr104" draw:text-style-name="P10" draw:layer="layout" svg:width="13.81cm" svg:height="1.015cm" svg:x="2.91cm" svg:y="7.898cm">
          <text:p text:style-name="P9"><text:span text:style-name="T5">Voice Assistant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5" draw:style-name="gr105" draw:text-style-name="P10" draw:layer="layout" svg:width="13.81cm" svg:height="1.015cm" svg:x="2.91cm" svg:y="9.406cm">
          <text:p text:style-name="P9"><text:span text:style-name="T5">OCR for Scanned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25" draw:style-name="gr106" draw:text-style-name="P10" draw:layer="layout" svg:width="13.81cm" svg:height="1.015cm" svg:x="2.91cm" svg:y="10.914cm">
          <text:p text:style-name="P9"><text:span text:style-name="T5">Multiple PDF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5" draw:style-name="gr107" draw:text-style-name="P10" draw:layer="layout" svg:width="13.81cm" svg:height="1.015cm" svg:x="2.91cm" svg:y="12.422cm">
          <text:p text:style-name="P9"><text:span text:style-name="T5">Multi-language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25" draw:style-name="gr108" draw:text-style-name="P10" draw:layer="layout" svg:width="13.81cm" svg:height="1.015cm" svg:x="18.468cm" svg:y="7.898cm">
          <text:p text:style-name="P9"><text:span text:style-name="T5">Progress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5" draw:style-name="gr109" draw:text-style-name="P10" draw:layer="layout" svg:width="13.81cm" svg:height="1.015cm" svg:x="18.468cm" svg:y="9.406cm">
          <text:p text:style-name="P9"><text:span text:style-name="T5">Cloud 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5" draw:style-name="gr110" draw:text-style-name="P10" draw:layer="layout" svg:width="13.81cm" svg:height="1.015cm" svg:x="18.468cm" svg:y="10.914cm">
          <text:p text:style-name="P9"><text:span text:style-name="T5">Mobile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5" draw:style-name="gr111" draw:text-style-name="P10" draw:layer="layout" svg:width="13.81cm" svg:height="1.015cm" svg:x="18.468cm" svg:y="12.422cm">
          <text:p text:style-name="P9"><text:span text:style-name="T5">Auto Study Pl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25" draw:style-name="gr1" draw:text-style-name="P1" draw:layer="layout" svg:width="0.475cm" svg:height="0.687cm" svg:x="1.588cm" svg:y="8.004cm">
          <draw:image xlink:href="Pictures/10000001000000120000001A14ECC5D0.png" xlink:type="simple" xlink:show="embed" xlink:actuate="onLoad" draw:mime-type="image/png">
            <text:p/>
          </draw:image>
          <svg:desc>image.png</svg:desc>
        </draw:frame>
        <draw:frame draw:name="Google Shape;355;p25" draw:style-name="gr1" draw:text-style-name="P1" draw:layer="layout" svg:width="0.634cm" svg:height="0.687cm" svg:x="1.588cm" svg:y="9.512cm">
          <draw:image xlink:href="Pictures/10000001000000180000001A8D66C716.png" xlink:type="simple" xlink:show="embed" xlink:actuate="onLoad" draw:mime-type="image/png">
            <text:p/>
          </draw:image>
          <svg:desc>image.png</svg:desc>
        </draw:frame>
        <draw:frame draw:name="Google Shape;356;p25" draw:style-name="gr1" draw:text-style-name="P1" draw:layer="layout" svg:width="0.713cm" svg:height="0.687cm" svg:x="1.588cm" svg:y="11.02cm">
          <draw:image xlink:href="Pictures/100000010000001B0000001A5AF08847.png" xlink:type="simple" xlink:show="embed" xlink:actuate="onLoad" draw:mime-type="image/png">
            <text:p/>
          </draw:image>
          <svg:desc>image.png</svg:desc>
        </draw:frame>
        <draw:frame draw:name="Google Shape;357;p25" draw:style-name="gr1" draw:text-style-name="P1" draw:layer="layout" svg:width="0.793cm" svg:height="0.687cm" svg:x="1.588cm" svg:y="12.528cm">
          <draw:image xlink:href="Pictures/100000010000001E0000001A33B2392B.png" xlink:type="simple" xlink:show="embed" xlink:actuate="onLoad" draw:mime-type="image/png">
            <text:p/>
          </draw:image>
          <svg:desc>image.png</svg:desc>
        </draw:frame>
        <draw:frame draw:name="Google Shape;358;p25" draw:style-name="gr1" draw:text-style-name="P1" draw:layer="layout" svg:width="0.634cm" svg:height="0.687cm" svg:x="17.145cm" svg:y="8.004cm">
          <draw:image xlink:href="Pictures/10000001000000180000001A1BC8BF9A.png" xlink:type="simple" xlink:show="embed" xlink:actuate="onLoad" draw:mime-type="image/png">
            <text:p/>
          </draw:image>
          <svg:desc>image.png</svg:desc>
        </draw:frame>
        <draw:frame draw:name="Google Shape;359;p25" draw:style-name="gr1" draw:text-style-name="P1" draw:layer="layout" svg:width="0.793cm" svg:height="0.687cm" svg:x="17.145cm" svg:y="9.512cm">
          <draw:image xlink:href="Pictures/100000010000001E0000001A8CD9E73E.png" xlink:type="simple" xlink:show="embed" xlink:actuate="onLoad" draw:mime-type="image/png">
            <text:p/>
          </draw:image>
          <svg:desc>image.png</svg:desc>
        </draw:frame>
        <draw:frame draw:name="Google Shape;360;p25" draw:style-name="gr1" draw:text-style-name="P1" draw:layer="layout" svg:width="0.475cm" svg:height="0.687cm" svg:x="17.145cm" svg:y="11.02cm">
          <draw:image xlink:href="Pictures/10000001000000120000001A3A8FA6A8.png" xlink:type="simple" xlink:show="embed" xlink:actuate="onLoad" draw:mime-type="image/png">
            <text:p/>
          </draw:image>
          <svg:desc>image.png</svg:desc>
        </draw:frame>
        <draw:frame draw:name="Google Shape;361;p25" draw:style-name="gr1" draw:text-style-name="P1" draw:layer="layout" svg:width="0.555cm" svg:height="0.687cm" svg:x="17.145cm" svg:y="12.528cm">
          <draw:image xlink:href="Pictures/10000001000000150000001A09748C1E.png" xlink:type="simple" xlink:show="embed" xlink:actuate="onLoad" draw:mime-type="image/png">
            <text:p/>
          </draw:image>
          <svg:desc>image.png</svg:desc>
        </draw:frame>
        <draw:custom-shape draw:name="Google Shape;362;p25" draw:style-name="gr112" draw:text-style-name="P7" draw:layer="layout" svg:width="31.67cm" svg:height="1.398cm" svg:x="2.117cm" svg:y="1.588cm">
          <text:p text:style-name="P6"><text:span text:style-name="T6">FUTURE 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5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2;p13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13:notes" draw:style-name="gr5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frame draw:name="Google Shape;368;p26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frame draw:name="Google Shape;369;p26" draw:style-name="gr1" draw:text-style-name="P1" draw:layer="layout" svg:width="4.92cm" svg:height="1.295cm" svg:x="14.473cm" svg:y="2.162cm">
          <draw:image xlink:href="Pictures/10000001000000BA0000003245742DE8.png" xlink:type="simple" xlink:show="embed" xlink:actuate="onLoad" draw:mime-type="image/png">
            <text:p/>
          </draw:image>
          <svg:desc>image.png</svg:desc>
        </draw:frame>
        <draw:custom-shape draw:name="Google Shape;370;p26" draw:style-name="gr113" draw:text-style-name="P5" draw:layer="layout" svg:width="23.812cm" svg:height="4.843cm" svg:x="5.027cm" svg:y="4.887cm">
          <text:p text:style-name="P4"><text:span text:style-name="T21">The </text:span><text:span text:style-name="T22">Intelligent Lecture Notes Assistant</text:span><text:span text:style-name="T21"> leverages RAG to transform traditional notes into an interactive AI-powered ecosystem. It enables faster, more accurate, and context-aware study support for the modern stud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26" draw:style-name="gr114" draw:text-style-name="P13" draw:layer="layout" svg:width="12.834cm" svg:height="5.079cm" svg:x="10.516cm" svg:y="9.258cm">
          <text:p text:style-name="P11"><text:span text:style-name="T23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6" draw:style-name="gr115" draw:text-style-name="P5" draw:layer="layout" svg:width="8.122cm" svg:height="2.421cm" svg:x="12.872cm" svg:y="13.597cm">
          <text:p text:style-name="P4"><text:span text:style-name="T21">Thank you for your atten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26" draw:style-name="gr116" draw:text-style-name="P13" draw:layer="layout" svg:width="5.714cm" svg:height="1.141cm" svg:x="14.076cm" svg:y="16.306cm">
          <text:p text:style-name="P11"><text:span text:style-name="T24">Presented by Team 5 •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5;p14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4:notes" draw:style-name="gr5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frame draw:name="Google Shape;378;p27" draw:style-name="gr1" draw:text-style-name="P1" draw:layer="layout" svg:width="33.866cm" svg:height="19.049cm" svg:x="0cm" svg:y="0cm">
          <draw:image xlink:href="Pictures/1000000100000500000002D0A9D9447A.png" xlink:type="simple" xlink:show="embed" xlink:actuate="onLoad" draw:mime-type="image/png">
            <text:p/>
          </draw:image>
          <svg:desc>image.png</svg:desc>
        </draw:frame>
        <draw:custom-shape draw:name="Google Shape;379;p27" draw:style-name="gr117" draw:text-style-name="P20" draw:layer="layout" svg:width="30.691cm" svg:height="2.729cm" svg:x="1.588cm" svg:y="6.292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27" draw:style-name="gr117" draw:text-style-name="P20" draw:layer="layout" svg:width="30.691cm" svg:height="2.179cm" svg:x="1.588cm" svg:y="9.022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27" draw:style-name="gr117" draw:text-style-name="P20" draw:layer="layout" svg:width="30.691cm" svg:height="2.179cm" svg:x="1.588cm" svg:y="11.202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27" draw:style-name="gr118" draw:text-style-name="P21" draw:layer="layout" svg:width="30.691cm" svg:height="0.025cm" svg:x="1.588cm" svg:y="8.99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27" draw:style-name="gr118" draw:text-style-name="P21" draw:layer="layout" svg:width="30.691cm" svg:height="0.025cm" svg:x="1.588cm" svg:y="8.99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27" draw:style-name="gr118" draw:text-style-name="P21" draw:layer="layout" svg:width="30.691cm" svg:height="0.025cm" svg:x="1.588cm" svg:y="11.17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27" draw:style-name="gr118" draw:text-style-name="P21" draw:layer="layout" svg:width="30.691cm" svg:height="0.025cm" svg:x="1.588cm" svg:y="11.17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27" draw:style-name="gr118" draw:text-style-name="P21" draw:layer="layout" svg:width="30.691cm" svg:height="0.025cm" svg:x="1.588cm" svg:y="13.35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27" draw:style-name="gr118" draw:text-style-name="P21" draw:layer="layout" svg:width="30.691cm" svg:height="0.025cm" svg:x="1.588cm" svg:y="13.356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8;p27" draw:style-name="gr1" draw:text-style-name="P1" draw:layer="layout" svg:width="2.38cm" svg:height="1.322cm" svg:x="1.588cm" svg:y="6.983cm">
          <draw:image xlink:href="Pictures/100000010000005A000000331C0E49AB.png" xlink:type="simple" xlink:show="embed" xlink:actuate="onLoad" draw:mime-type="image/png">
            <text:p/>
          </draw:image>
          <svg:desc>image.png</svg:desc>
        </draw:frame>
        <draw:custom-shape draw:name="Google Shape;389;p27" draw:style-name="gr119" draw:text-style-name="P10" draw:layer="layout" svg:width="27.648cm" svg:height="1.319cm" svg:x="4.63cm" svg:y="6.689cm">
          <text:p text:style-name="P9"><text:span text:style-name="T25">https://images.ctfassets.net/lzny33ho1g45/3x94Kjg8z9fN0zryKetKbf/a197e626de8b9035f0604ee212722f03/best-ipad-note-taking-apps.jpg?fm=jpg&amp;q=31&amp;fit=thumb&amp;w=1520&amp;h=7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27" draw:style-name="gr120" draw:text-style-name="P10" draw:layer="layout" svg:width="27.648cm" svg:height="0.811cm" svg:x="4.63cm" svg:y="7.922cm">
          <text:p text:style-name="P9"><text:span text:style-name="T12">Source: </text:span><text:span text:style-name="T26">zapi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27" draw:style-name="gr1" draw:text-style-name="P1" draw:layer="layout" svg:width="2.38cm" svg:height="1.322cm" svg:x="1.588cm" svg:y="9.437cm">
          <draw:image xlink:href="Pictures/100000010000005A00000033C60F4664.png" xlink:type="simple" xlink:show="embed" xlink:actuate="onLoad" draw:mime-type="image/png">
            <text:p/>
          </draw:image>
          <svg:desc>image.png</svg:desc>
        </draw:frame>
        <draw:custom-shape draw:name="Google Shape;392;p27" draw:style-name="gr121" draw:text-style-name="P10" draw:layer="layout" svg:width="27.648cm" svg:height="0.659cm" svg:x="4.63cm" svg:y="9.419cm">
          <text:p text:style-name="P9"><text:span text:style-name="T25">https://multipurposethemes.com/wp-content/uploads/2026/02/EduAdmin-Templates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27" draw:style-name="gr122" draw:text-style-name="P10" draw:layer="layout" svg:width="27.648cm" svg:height="0.811cm" svg:x="4.63cm" svg:y="10.102cm">
          <text:p text:style-name="P9"><text:span text:style-name="T12">Source: </text:span><text:span text:style-name="T26">multipurposetheme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27" draw:style-name="gr1" draw:text-style-name="P1" draw:layer="layout" svg:width="2.433cm" svg:height="2.962cm" svg:x="1.588cm" svg:y="11.617cm">
          <draw:image xlink:href="Pictures/100000010000005C0000007161A22551.png" xlink:type="simple" xlink:show="embed" xlink:actuate="onLoad" draw:mime-type="image/png">
            <text:p/>
          </draw:image>
          <svg:desc>image.png</svg:desc>
        </draw:frame>
        <draw:custom-shape draw:name="Google Shape;395;p27" draw:style-name="gr123" draw:text-style-name="P10" draw:layer="layout" svg:width="27.648cm" svg:height="0.659cm" svg:x="4.63cm" svg:y="11.599cm">
          <text:p text:style-name="P9"><text:span text:style-name="T25">https://fastly.mwm-storage.mwmcdn.com/raw_files/557ff679-694b-42bc-8fe0-61413e9fbc32?height=256&amp;format=we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27" draw:style-name="gr124" draw:text-style-name="P10" draw:layer="layout" svg:width="27.648cm" svg:height="0.811cm" svg:x="4.63cm" svg:y="12.282cm">
          <text:p text:style-name="P9"><text:span text:style-name="T12">Source: </text:span><text:span text:style-name="T26">mwm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27" draw:style-name="gr1" draw:text-style-name="P1" draw:layer="layout" svg:width="2.38cm" svg:height="1.322cm" svg:x="1.588cm" svg:y="13.797cm">
          <draw:image xlink:href="Pictures/100000010000005A0000003381287BC4.png" xlink:type="simple" xlink:show="embed" xlink:actuate="onLoad" draw:mime-type="image/png">
            <text:p/>
          </draw:image>
          <svg:desc>image.png</svg:desc>
        </draw:frame>
        <draw:custom-shape draw:name="Google Shape;398;p27" draw:style-name="gr125" draw:text-style-name="P10" draw:layer="layout" svg:width="27.648cm" svg:height="1.319cm" svg:x="4.63cm" svg:y="13.779cm">
          <text:p text:style-name="P9"><text:span text:style-name="T25">https://www.k2view.com/hs-fs/hubfs/RAG%20diagram%20for%20data%20readiness.png?width=1405&amp;height=620&amp;name=RAG%20diagram%20for%20data%20readiness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7" draw:style-name="gr126" draw:text-style-name="P10" draw:layer="layout" svg:width="27.648cm" svg:height="0.811cm" svg:x="4.63cm" svg:y="14.462cm">
          <text:p text:style-name="P9"><text:span text:style-name="T12">Source: </text:span><text:span text:style-name="T26">www.k2view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7" draw:style-name="gr127" draw:text-style-name="P7" draw:layer="layout" svg:width="31.67cm" svg:height="1.398cm" svg:x="2.117cm" svg:y="1.588cm">
          <text:p text:style-name="P6"><text:span text:style-name="T6">IMAGE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7" draw:style-name="gr15" draw:text-style-name="P12" draw:layer="layout" svg:width="0.211cm" svg:height="1.719cm" svg:x="1.588cm" svg:y="1.588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5;p15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6;p15:notes" draw:style-name="gr5" draw:layer="layout" svg:width="12.7cm" svg:height="9.524cm" svg:x="3.176cm" svg:y="1.90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ato" svg:font-family="Lato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Poppins SemiBold" svg:font-family="'Poppi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1" presentation:style-name="VERTICAL_5f_TEX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70;p11" presentation:style-name="VERTICAL_5f_TEXT-outline1" draw:layer="backgroundobjects" svg:width="12.571cm" svg:height="22.859cm" draw:transform="rotate (-1.5707963267949) translate (24.13cm 4.445cm)" presentation:class="outline" presentation:placeholder="true" presentation:user-transformed="true">
        <draw:text-box/>
      </draw:frame>
      <draw:frame draw:name="Google Shape;71;p11" presentation:style-name="Mpr4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72;p11" presentation:style-name="Mpr4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73;p11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5;p12" presentation:style-name="VERTICAL_5f_TITLE_5f_AND_5f_VERTICAL_5f_TEXT-title" draw:layer="backgroundobjects" svg:width="16.253cm" svg:height="5.714cm" draw:transform="rotate (-1.5707963267949) translate (24.13cm 0.763cm)" presentation:class="title" presentation:placeholder="true" presentation:user-transformed="true">
        <draw:text-box/>
      </draw:frame>
      <draw:frame draw:name="Google Shape;76;p12" presentation:style-name="VERTICAL_5f_TITLE_5f_AND_5f_VERTICAL_5f_TEXT-outline1" draw:layer="backgroundobjects" svg:width="16.253cm" svg:height="16.721cm" draw:transform="rotate (-1.5707963267949) translate (17.992cm 0.763cm)" presentation:class="outline" presentation:placeholder="true" presentation:user-transformed="true">
        <draw:text-box/>
      </draw:frame>
      <draw:frame draw:name="Google Shape;77;p12" presentation:style-name="Mpr7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78;p12" presentation:style-name="Mpr7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79;p12" presentation:style-name="Mpr7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cm" svg:height="0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3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8;p3" presentation:style-name="Mpr10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19;p3" presentation:style-name="Mpr10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20;p3" presentation:style-name="Mpr10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0cm" svg:height="0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2;p4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23;p4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24;p4" presentation:style-name="Mpr13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25;p4" presentation:style-name="Mpr13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26;p4" presentation:style-name="Mpr13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0cm" svg:height="0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8;p5" presentation:style-name="SECTION_5f_HEADER-title" draw:layer="backgroundobjects" svg:width="21.589cm" svg:height="3.783cm" svg:x="2.006cm" svg:y="12.241cm" presentation:class="title" presentation:placeholder="true" presentation:user-transformed="true">
        <draw:text-box/>
      </draw:frame>
      <draw:frame draw:name="Google Shape;29;p5" presentation:style-name="SECTION_5f_HEADER-outline1" draw:layer="backgroundobjects" svg:width="21.589cm" svg:height="4.166cm" svg:x="2.006cm" svg:y="8.074cm" presentation:class="outline" presentation:placeholder="true" presentation:user-transformed="true">
        <draw:text-box/>
      </draw:frame>
      <draw:frame draw:name="Google Shape;30;p5" presentation:style-name="Mpr16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31;p5" presentation:style-name="Mpr16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32;p5" presentation:style-name="Mpr16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6" presentation:style-name="TWO_5f_OBJECTS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35;p6" presentation:style-name="TWO_5f_OBJECTS-outline1" draw:layer="backgroundobjects" svg:width="11.217cm" svg:height="12.571cm" svg:x="1.27cm" svg:y="4.445cm" presentation:class="outline" presentation:placeholder="true" presentation:user-transformed="true">
        <draw:text-box/>
      </draw:frame>
      <draw:frame draw:name="Google Shape;36;p6" presentation:style-name="TWO_5f_OBJECTS-outline1" draw:layer="backgroundobjects" svg:width="11.217cm" svg:height="12.571cm" svg:x="12.912cm" svg:y="4.445cm" presentation:class="outline" presentation:placeholder="true" presentation:user-transformed="true">
        <draw:text-box/>
      </draw:frame>
      <draw:frame draw:name="Google Shape;37;p6" presentation:style-name="Mpr19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38;p6" presentation:style-name="Mpr19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39;p6" presentation:style-name="Mpr19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cm" svg:height="0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1;p7" presentation:style-name="TWO_5f_OBJECTS_5f_WITH_5f_TEX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42;p7" presentation:style-name="TWO_5f_OBJECTS_5f_WITH_5f_TEXT-outline1" draw:layer="backgroundobjects" svg:width="11.222cm" svg:height="1.776cm" svg:x="1.27cm" svg:y="4.264cm" presentation:class="outline" presentation:placeholder="true" presentation:user-transformed="true">
        <draw:text-box/>
      </draw:frame>
      <draw:frame draw:name="Google Shape;43;p7" presentation:style-name="TWO_5f_OBJECTS_5f_WITH_5f_TEXT-outline1" draw:layer="backgroundobjects" svg:width="11.222cm" svg:height="10.975cm" svg:x="1.27cm" svg:y="6.041cm" presentation:class="outline" presentation:placeholder="true" presentation:user-transformed="true">
        <draw:text-box/>
      </draw:frame>
      <draw:frame draw:name="Google Shape;44;p7" presentation:style-name="TWO_5f_OBJECTS_5f_WITH_5f_TEXT-outline1" draw:layer="backgroundobjects" svg:width="11.226cm" svg:height="1.776cm" svg:x="12.903cm" svg:y="4.264cm" presentation:class="outline" presentation:placeholder="true" presentation:user-transformed="true">
        <draw:text-box/>
      </draw:frame>
      <draw:frame draw:name="Google Shape;45;p7" presentation:style-name="TWO_5f_OBJECTS_5f_WITH_5f_TEXT-outline1" draw:layer="backgroundobjects" svg:width="11.226cm" svg:height="10.975cm" svg:x="12.903cm" svg:y="6.041cm" presentation:class="outline" presentation:placeholder="true" presentation:user-transformed="true">
        <draw:text-box/>
      </draw:frame>
      <draw:frame draw:name="Google Shape;46;p7" presentation:style-name="Mpr22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47;p7" presentation:style-name="Mpr22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48;p7" presentation:style-name="Mpr22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50;p8" presentation:style-name="TITLE_5f_ONL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51;p8" presentation:style-name="Mpr25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52;p8" presentation:style-name="Mpr25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53;p8" presentation:style-name="Mpr25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55;p9" presentation:style-name="OBJECT_5f_WITH_5f_CAPTION_5f_TEXT-title" draw:layer="backgroundobjects" svg:width="8.355cm" svg:height="3.227cm" svg:x="1.27cm" svg:y="0.758cm" presentation:class="title" presentation:placeholder="true" presentation:user-transformed="true">
        <draw:text-box/>
      </draw:frame>
      <draw:frame draw:name="Google Shape;56;p9" presentation:style-name="OBJECT_5f_WITH_5f_CAPTION_5f_TEXT-outline1" draw:layer="backgroundobjects" svg:width="14.198cm" svg:height="16.258cm" svg:x="9.931cm" svg:y="0.758cm" presentation:class="outline" presentation:placeholder="true" presentation:user-transformed="true">
        <draw:text-box/>
      </draw:frame>
      <draw:frame draw:name="Google Shape;57;p9" presentation:style-name="OBJECT_5f_WITH_5f_CAPTION_5f_TEXT-outline1" draw:layer="backgroundobjects" svg:width="8.355cm" svg:height="13.03cm" svg:x="1.27cm" svg:y="3.986cm" presentation:class="outline" presentation:placeholder="true" presentation:user-transformed="true">
        <draw:text-box/>
      </draw:frame>
      <draw:frame draw:name="Google Shape;58;p9" presentation:style-name="Mpr28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59;p9" presentation:style-name="Mpr28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60;p9" presentation:style-name="Mpr28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0" presentation:style-name="PICTURE_5f_WITH_5f_CAPTION_5f_TEXT-title" draw:layer="backgroundobjects" svg:width="15.239cm" svg:height="1.573cm" svg:x="4.979cm" svg:y="13.335cm" presentation:class="title" presentation:placeholder="true" presentation:user-transformed="true">
        <draw:text-box/>
      </draw:frame>
      <draw:frame draw:name="Google Shape;63;p10" presentation:style-name="PICTURE_5f_WITH_5f_CAPTION_5f_TEXT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Google Shape;64;p10" presentation:style-name="PICTURE_5f_WITH_5f_CAPTION_5f_TEXT-outline1" draw:layer="backgroundobjects" svg:width="15.239cm" svg:height="2.235cm" svg:x="4.979cm" svg:y="14.909cm" presentation:class="outline" presentation:placeholder="true" presentation:user-transformed="true">
        <draw:text-box/>
      </draw:frame>
      <draw:frame draw:name="Google Shape;65;p10" presentation:style-name="Mpr31" draw:text-style-name="MP5" draw:layer="backgroundobjects" svg:width="5.926cm" svg:height="1.013cm" svg:x="1.27cm" svg:y="17.657cm" presentation:class="date-time" presentation:user-transformed="true">
        <draw:text-box>
          <text:p text:style-name="MP1"><presentation:date-time/></text:p>
        </draw:text-box>
      </draw:frame>
      <draw:frame draw:name="Google Shape;66;p10" presentation:style-name="Mpr31" draw:text-style-name="MP5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Google Shape;67;p10" presentation:style-name="Mpr31" draw:text-style-name="MP5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9T11:20:58.035000000</dc:date>
    <meta:editing-duration>PT1M47S</meta:editing-duration>
    <meta:editing-cycles>1</meta:editing-cycles>
    <meta:document-statistic meta:object-count="426"/>
    <meta:generator>LibreOffice/24.8.0.3$Windows_X86_64 LibreOffice_project/0bdf1299c94fe897b119f97f3c613e9dca6be583</meta:generator>
  </office:meta>
</office:document-meta>
</file>